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0.0007in" fo:margin-top="0in" fo:margin-bottom="0in" table:align="left" style:writing-mode="page"/>
    </style:style>
    <style:style style:name="Table1.A" style:family="table-column">
      <style:table-column-properties style:column-width="2.6771in"/>
    </style:style>
    <style:style style:name="Table1.B" style:family="table-column">
      <style:table-column-properties style:column-width="4.0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1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7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7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" style:family="table">
      <style:table-properties style:width="6.6931in" fo:margin-left="0.0007in" fo:margin-top="0in" fo:margin-bottom="0in" table:align="left" style:writing-mode="page"/>
    </style:style>
    <style:style style:name="Table2.A" style:family="table-column">
      <style:table-column-properties style:column-width="2.007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0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2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" style:family="table">
      <style:table-properties style:width="6.6931in" fo:margin-left="0.0007in" fo:margin-top="0in" fo:margin-bottom="0in" table:align="left" style:writing-mode="page"/>
    </style:style>
    <style:style style:name="Table3.A" style:family="table-column">
      <style:table-column-properties style:column-width="2.2083in"/>
    </style:style>
    <style:style style:name="Table3.B" style:family="table-column">
      <style:table-column-properties style:column-width="2.2757in"/>
    </style:style>
    <style:style style:name="Table3.C" style:family="table-column">
      <style:table-column-properties style:column-width="2.2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3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P1" style:family="paragraph" style:parent-style-name="Heading_20_1">
      <style:paragraph-properties fo:margin-top="0in" fo:margin-bottom="0.1665in" style:contextual-spacing="false" fo:break-before="pag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1.111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.0693in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.0555in" style:contextual-spacing="false" fo:text-align="end" style:justify-single-word="false"/>
    </style:style>
    <style:style style:name="P10" style:family="paragraph" style:parent-style-name="Standard">
      <style:paragraph-properties fo:margin-top="0in" fo:margin-bottom="1.111in" style:contextual-spacing="false" fo:text-align="end" style:justify-single-word="false"/>
    </style:style>
    <style:style style:name="P11" style:family="paragraph" style:parent-style-name="Standard">
      <style:paragraph-properties fo:margin-top="0in" fo:margin-bottom="0.111in" style:contextual-spacing="false"/>
    </style:style>
    <style:style style:name="P12" style:family="paragraph" style:parent-style-name="Standard">
      <loext:graphic-properties draw:fill="solid" draw:fill-color="#f2f2f2"/>
      <style:paragraph-properties fo:margin-top="0in" fo:margin-bottom="0.028in" style:contextual-spacing="false" fo:background-color="#f2f2f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nsolas" fo:font-size="10pt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[НАИМЕНОВАНИЕ ОБРАЗОВАТЕЛЬНОЙ ОРГАНИЗАЦИИ]</text:span></text:p>
      <text:p text:style-name="P6"><text:span text:style-name="T1">[Колледж / отделение]</text:span></text:p>
      <text:p text:style-name="P5"><text:span text:style-name="T2">РУКОВОДСТВО ПОЛЬЗОВАТЕЛЯ</text:span></text:p>
      <text:p text:style-name="P7"><text:span text:style-name="T3">(оформлено в соответствии с ГОСТ 19.505-79)</text:span></text:p>
      <text:p text:style-name="P6"><text:span text:style-name="T5">[НАЗВАНИЕ ПРОГРАММНОГО ОБЕСПЕЧЕНИЯ], версия [X.X]</text:span></text:p>
      <text:p text:style-name="P9"><text:span text:style-name="T4">Составил: [Фамилия И.О.]</text:span></text:p>
      <text:p text:style-name="P9"><text:span text:style-name="T4">Группа: [номер группы]</text:span></text:p>
      <text:p text:style-name="P10"><text:span text:style-name="T4">Экзаменационный билет № [номер]</text:span></text:p>
      <text:p text:style-name="P8"><text:span text:style-name="T4">[Москва, 2026]</text:span></text:p>
      <text:p text:style-name="Standard"/>
      <text:h text:style-name="P1" text:outline-level="1">АННОТАЦИЯ</text:h>
      <text:p text:style-name="P11"><text:span text:style-name="T6">Настоящий документ является руководством пользователя для программы [НАЗВАНИЕ ПО] версии [X.X] и содержит сведения о её назначении, условиях выполнения, порядке работы и возможных сообщениях оператору. Документ оформлен в соответствии с ГОСТ 19.505-79 «Единая система программной документации. Руководство оператора. Требования к содержанию и оформлению».</text:span></text:p>
      <text:p text:style-name="Standard"/>
      <text:h text:style-name="P1" text:outline-level="1">СОДЕРЖАНИЕ</text:h>
      <text:p text:style-name="P11"><text:span text:style-name="T6">Аннотация</text:span></text:p>
      <text:p text:style-name="P11"><text:span text:style-name="T6">1. Назначение программы</text:span></text:p>
      <text:p text:style-name="P11"><text:span text:style-name="T6">2. Условия выполнения программы</text:span></text:p>
      <text:p text:style-name="P11"><text:span text:style-name="T6">3. Выполнение программы</text:span></text:p>
      <text:p text:style-name="P11"><text:span text:style-name="T6"><text:s text:c="3"/>3.1 Запуск программы</text:span></text:p>
      <text:p text:style-name="P11"><text:span text:style-name="T6"><text:s text:c="3"/>3.2 Описание операций</text:span></text:p>
      <text:p text:style-name="P11"><text:span text:style-name="T6"><text:s text:c="3"/>3.3 Завершение работы</text:span></text:p>
      <text:p text:style-name="P11"><text:span text:style-name="T6">4. Сообщения оператору</text:span></text:p>
      <text:p text:style-name="P11"><text:span text:style-name="T6">Приложение А. Скриншоты интерфейса программы</text:span></text:p>
      <text:p text:style-name="P11"><text:span text:style-name="T6">Приложение Б. Промпт для DeepSeek (служебная страница — удалить перед сдачей)</text:span></text:p>
      <text:p text:style-name="Standard"/>
      <text:h text:style-name="P1" text:outline-level="1">1. НАЗНАЧЕНИЕ ПРОГРАММЫ</text:h>
      <text:p text:style-name="P11"><text:span text:style-name="T6">В данном разделе приводятся сведения о назначении программы и информация, достаточная для понимания её функций и эксплуатации.</text:span></text:p>
      <text:list text:style-name="WWNum2">
        <text:list-item text:start-value="1">
          <text:p text:style-name="P2">Полное наименование: [точное название ПО]</text:p>
        </text:list-item>
        <text:list-item>
          <text:p text:style-name="P2">Версия: [X.X]</text:p>
        </text:list-item>
        <text:list-item>
          <text:p text:style-name="P2">Разработчик / правообладатель: [компания или сообщество]</text:p>
        </text:list-item>
        <text:list-item>
          <text:p text:style-name="P2">Тип распространения: [свободное ПО / open-source / лицензия X]</text:p>
        </text:list-item>
        <text:list-item>
          <text:p text:style-name="P2">Назначение программы: [1-2 предложения о том, для какой задачи предназначена программа]</text:p>
        </text:list-item>
      </text:list>
      <text:p text:style-name="P11"><text:span text:style-name="T6">Основные функции программы:</text:span></text:p>
      <text:list text:continue-numbering="true" text:style-name="WWNum2">
        <text:list-item>
          <text:p text:style-name="P2">[функция 1]</text:p>
        </text:list-item>
        <text:list-item>
          <text:p text:style-name="P2">[функция 2]</text:p>
        </text:list-item>
        <text:list-item>
          <text:p text:style-name="P2">[функция 3]</text:p>
        </text:list-item>
      </text:list>
      <text:h text:style-name="Heading_20_1" text:outline-level="1">2. УСЛОВИЯ ВЫПОЛНЕНИЯ ПРОГРАММЫ</text:h>
      <text:p text:style-name="P11"><text:span text:style-name="T6">В данном разделе указаны условия, необходимые для выполнения программы (минимальный и (или) максимальный состав аппаратных и программных средств)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7">Параметр</text:span></text:p>
          </table:table-cell>
          <table:table-cell table:style-name="Table1.A1" office:value-type="string">
            <text:p text:style-name="Standard"><text:span text:style-name="T7">Значение</text:span></text:p>
          </table:table-cell>
        </table:table-row>
        <table:table-row table:style-name="Table1.1">
          <table:table-cell table:style-name="Table1.A2" office:value-type="string">
            <text:p text:style-name="Standard">Операционная система</text:p>
          </table:table-cell>
          <table:table-cell table:style-name="Table1.B2" office:value-type="string">
            <text:p text:style-name="Standard">[например, Ubuntu 22.04 LTS и новее]</text:p>
          </table:table-cell>
        </table:table-row>
        <table:table-row table:style-name="Table1.1">
          <table:table-cell table:style-name="Table1.A3" office:value-type="string">
            <text:p text:style-name="Standard">Минимальный объём ОЗУ</text:p>
          </table:table-cell>
          <table:table-cell table:style-name="Table1.B3" office:value-type="string">
            <text:p text:style-name="Standard">[например, 2 ГБ]</text:p>
          </table:table-cell>
        </table:table-row>
        <table:table-row table:style-name="Table1.1">
          <table:table-cell table:style-name="Table1.A4" office:value-type="string">
            <text:p text:style-name="Standard">Свободное место на диске</text:p>
          </table:table-cell>
          <table:table-cell table:style-name="Table1.B4" office:value-type="string">
            <text:p text:style-name="Standard">[например, 1 ГБ]</text:p>
          </table:table-cell>
        </table:table-row>
        <table:table-row table:style-name="Table1.1">
          <table:table-cell table:style-name="Table1.A5" office:value-type="string">
            <text:p text:style-name="Standard">Дополнительное ПО / зависимости</text:p>
          </table:table-cell>
          <table:table-cell table:style-name="Table1.B5" office:value-type="string">
            <text:p text:style-name="Standard">[библиотеки, runtime, драйверы]</text:p>
          </table:table-cell>
        </table:table-row>
        <table:table-row table:style-name="Table1.1">
          <table:table-cell table:style-name="Table1.A6" office:value-type="string">
            <text:p text:style-name="Standard">Поддерживаемое оборудование</text:p>
          </table:table-cell>
          <table:table-cell table:style-name="Table1.B6" office:value-type="string">
            <text:p text:style-name="Standard">[если применимо: отладочная плата, программатор и т.п.]</text:p>
          </table:table-cell>
        </table:table-row>
        <table:table-row table:style-name="Table1.1">
          <table:table-cell table:style-name="Table1.A7" office:value-type="string">
            <text:p text:style-name="Standard">Права доступа пользователя</text:p>
          </table:table-cell>
          <table:table-cell table:style-name="Table1.B7" office:value-type="string">
            <text:p text:style-name="Standard">[например, права sudo для установки]</text:p>
          </table:table-cell>
        </table:table-row>
      </table:table>
      <text:p text:style-name="Standard"/>
      <text:h text:style-name="P1" text:outline-level="1">3. ВЫПОЛНЕНИЕ ПРОГРАММЫ</text:h>
      <text:p text:style-name="P11"><text:span text:style-name="T6">В данном разделе указана последовательность действий пользователя, обеспечивающих загрузку, запуск, выполнение и завершение программы.</text:span></text:p>
      <text:h text:style-name="Heading_20_2" text:outline-level="2">3.1 Запуск программы</text:h>
      <text:list text:style-name="WWNum3">
        <text:list-item text:start-value="1">
          <text:p text:style-name="P3">[способ запуска 1 — например, через меню приложений: Приложения -&gt; ... -&gt; ...]</text:p>
        </text:list-item>
        <text:list-item>
          <text:p text:style-name="P3">[способ запуска 2 — например, через терминал: команда]</text:p>
        </text:list-item>
        <text:list-item>
          <text:p text:style-name="P3">[способ запуска 3 — например, ярлык на рабочем столе]</text:p>
        </text:list-item>
      </text:list>
      <text:h text:style-name="Heading_20_2" text:outline-level="2">3.2 Описание операций</text:h>
      <text:p text:style-name="P11"><text:span text:style-name="T6">Основные операции, выполняемые пользователем при работе с программой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7">Операция</text:span></text:p>
          </table:table-cell>
          <table:table-cell table:style-name="Table2.A1" office:value-type="string">
            <text:p text:style-name="Standard"><text:span text:style-name="T7">Действия пользователя</text:span></text:p>
          </table:table-cell>
          <table:table-cell table:style-name="Table2.A1" office:value-type="string">
            <text:p text:style-name="Standard"><text:span text:style-name="T7">Результат</text:span></text:p>
          </table:table-cell>
        </table:table-row>
        <table:table-row table:style-name="Table2.1">
          <table:table-cell table:style-name="Table2.A2" office:value-type="string">
            <text:p text:style-name="Standard">Создание нового проекта/файла</text:p>
          </table:table-cell>
          <table:table-cell table:style-name="Table2.B2" office:value-type="string">
            <text:p text:style-name="Standard">[Файл -&gt; Создать -&gt; ...]</text:p>
          </table:table-cell>
          <table:table-cell table:style-name="Table2.C2" office:value-type="string">
            <text:p text:style-name="Standard">[открывается новый проект]</text:p>
          </table:table-cell>
        </table:table-row>
        <table:table-row table:style-name="Table2.1">
          <table:table-cell table:style-name="Table2.A3" office:value-type="string">
            <text:p text:style-name="Standard">Открытие существующего файла</text:p>
          </table:table-cell>
          <table:table-cell table:style-name="Table2.B3" office:value-type="string">
            <text:p text:style-name="Standard">[Файл -&gt; Открыть -&gt; выбрать файл]</text:p>
          </table:table-cell>
          <table:table-cell table:style-name="Table2.C3" office:value-type="string">
            <text:p text:style-name="Standard">[файл загружается в рабочую область]</text:p>
          </table:table-cell>
        </table:table-row>
        <table:table-row table:style-name="Table2.1">
          <table:table-cell table:style-name="Table2.A4" office:value-type="string">
            <text:p text:style-name="Standard">[основная операция программы]</text:p>
          </table:table-cell>
          <table:table-cell table:style-name="Table2.B4" office:value-type="string">
            <text:p text:style-name="Standard">[описать главную функцию из задания билета]</text:p>
          </table:table-cell>
          <table:table-cell table:style-name="Table2.C4" office:value-type="string">
            <text:p text:style-name="Standard">[результат выполнения операции]</text:p>
          </table:table-cell>
        </table:table-row>
        <table:table-row table:style-name="Table2.1">
          <table:table-cell table:style-name="Table2.A5" office:value-type="string">
            <text:p text:style-name="Standard">Сохранение результата</text:p>
          </table:table-cell>
          <table:table-cell table:style-name="Table2.B5" office:value-type="string">
            <text:p text:style-name="Standard">Файл -&gt; Сохранить (Ctrl+S)</text:p>
          </table:table-cell>
          <table:table-cell table:style-name="Table2.C5" office:value-type="string">
            <text:p text:style-name="Standard">[файл сохранён]</text:p>
          </table:table-cell>
        </table:table-row>
        <table:table-row table:style-name="Table2.1">
          <table:table-cell table:style-name="Table2.A6" office:value-type="string">
            <text:p text:style-name="Standard">[дополнительная операция]</text:p>
          </table:table-cell>
          <table:table-cell table:style-name="Table2.B6" office:value-type="string">
            <text:p text:style-name="Standard">[действия пользователя]</text:p>
          </table:table-cell>
          <table:table-cell table:style-name="Table2.C6" office:value-type="string">
            <text:p text:style-name="Standard">[результат]</text:p>
          </table:table-cell>
        </table:table-row>
      </table:table>
      <text:h text:style-name="Heading_20_2" text:outline-level="2">3.3 Завершение работы</text:h>
      <text:list text:style-name="WWNum4">
        <text:list-item text:start-value="1">
          <text:p text:style-name="P4">[способ завершения 1 — например, Файл -&gt; Выход]</text:p>
        </text:list-item>
        <text:list-item>
          <text:p text:style-name="P4">[способ завершения 2 — например, сочетание клавиш]</text:p>
        </text:list-item>
      </text:list>
      <text:p text:style-name="Standard"/>
      <text:h text:style-name="P1" text:outline-level="1">4. СООБЩЕНИЯ ОПЕРАТОРУ</text:h>
      <text:p text:style-name="P11"><text:span text:style-name="T6">В данном разделе приведены тексты сообщений, выдаваемых программой в ходе выполнения, описание их содержания и соответствующие действия пользователя (в том числе действия в случае сбоя, возможности повторного запуска программы)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7">Сообщение / текст</text:span></text:p>
          </table:table-cell>
          <table:table-cell table:style-name="Table3.A1" office:value-type="string">
            <text:p text:style-name="Standard"><text:span text:style-name="T7">Причина возникновения</text:span></text:p>
          </table:table-cell>
          <table:table-cell table:style-name="Table3.A1" office:value-type="string">
            <text:p text:style-name="Standard"><text:span text:style-name="T7">Действие пользователя</text:span></text:p>
          </table:table-cell>
        </table:table-row>
        <table:table-row table:style-name="Table3.1">
          <table:table-cell table:style-name="Table3.A2" office:value-type="string">
            <text:p text:style-name="Standard">[сообщение 1]</text:p>
          </table:table-cell>
          <table:table-cell table:style-name="Table3.B2" office:value-type="string">
            <text:p text:style-name="Standard">[причина]</text:p>
          </table:table-cell>
          <table:table-cell table:style-name="Table3.C2" office:value-type="string">
            <text:p text:style-name="Standard">[действие]</text:p>
          </table:table-cell>
        </table:table-row>
        <table:table-row table:style-name="Table3.1">
          <table:table-cell table:style-name="Table3.A3" office:value-type="string">
            <text:p text:style-name="Standard">[сообщение 2]</text:p>
          </table:table-cell>
          <table:table-cell table:style-name="Table3.B3" office:value-type="string">
            <text:p text:style-name="Standard">[причина]</text:p>
          </table:table-cell>
          <table:table-cell table:style-name="Table3.C3" office:value-type="string">
            <text:p text:style-name="Standard">[действие]</text:p>
          </table:table-cell>
        </table:table-row>
        <table:table-row table:style-name="Table3.1">
          <table:table-cell table:style-name="Table3.A4" office:value-type="string">
            <text:p text:style-name="Standard">[сообщение 3]</text:p>
          </table:table-cell>
          <table:table-cell table:style-name="Table3.B4" office:value-type="string">
            <text:p text:style-name="Standard">[причина]</text:p>
          </table:table-cell>
          <table:table-cell table:style-name="Table3.C4" office:value-type="string">
            <text:p text:style-name="Standard">[действие]</text:p>
          </table:table-cell>
        </table:table-row>
        <table:table-row table:style-name="Table3.1">
          <table:table-cell table:style-name="Table3.A5" office:value-type="string">
            <text:p text:style-name="Standard">[сообщение об ошибке / сбое]</text:p>
          </table:table-cell>
          <table:table-cell table:style-name="Table3.B5" office:value-type="string">
            <text:p text:style-name="Standard">[причина сбоя]</text:p>
          </table:table-cell>
          <table:table-cell table:style-name="Table3.C5" office:value-type="string">
            <text:p text:style-name="Standard">[как перезапустить программу]</text:p>
          </table:table-cell>
        </table:table-row>
      </table:table>
      <text:p text:style-name="Standard"/>
      <text:h text:style-name="P1" text:outline-level="1">ПРИЛОЖЕНИЕ А. Скриншоты интерфейса программы</text:h>
      <text:p text:style-name="P11"><text:span text:style-name="T6">В данное приложение включены материалы, иллюстрирующие содержание разделов руководства (допускается по п. 2.6-2.7 ГОСТ 19.505-79).</text:span></text:p>
      <text:p text:style-name="P11"><text:span text:style-name="T8">[Вставить 2-3 скриншота: сделать снимок экрана (Print Screen) -&gt; Вставка -&gt; Рисунок]</text:span></text:p>
      <text:p text:style-name="Standard"/>
      <text:h text:style-name="P1" text:outline-level="1">ПРИЛОЖЕНИЕ Б. Промпт для DeepSeek</text:h>
      <text:p text:style-name="P11"><text:span text:style-name="T9">Эта страница — служебная, для подготовки текста разделов 1-4. Перед сдачей готового документа преподавателю эту страницу нужно удалить.</text:span></text:p>
      <text:p text:style-name="P11"><text:span text:style-name="T6">Как использовать: скопируй промпт ниже целиком, вставь вместо плейсхолдеров название программы и текст задания из билета, отправь в DeepSeek. Полученный текст вставь в разделы 1-4 этого документа вместо квадратных плейсхолдеров.</text:span></text:p>
      <text:p text:style-name="P12"><text:span text:style-name="T10">Ты помогаешь составить «Руководство пользователя» по ГОСТ 19.505-79</text:span></text:p>
      <text:p text:style-name="P12"><text:span text:style-name="T10">для квалификационного экзамена по ПМ.04 «Сопровождение и обслуживание</text:span></text:p>
      <text:p text:style-name="P12"><text:span text:style-name="T10">программного обеспечения» (спец. 09.02.07).</text:span></text:p>
      <text:p text:style-name="P12"/>
      <text:p text:style-name="P12"><text:span text:style-name="T10">ПРОГРАММА, для которой нужно написать руководство:</text:span></text:p>
      <text:p text:style-name="P12"><text:span text:style-name="T10">[НАЗВАНИЕ ПРОГРАММЫ И ВЕРСИЯ]</text:span></text:p>
      <text:p text:style-name="P12"/>
      <text:p text:style-name="P12"><text:span text:style-name="T10">ТЕКСТ ЗАДАНИЯ ИЗ БИЛЕТА (вставь как в билете):</text:span></text:p>
      <text:p text:style-name="P12"><text:span text:style-name="T10">"""</text:span></text:p>
      <text:p text:style-name="P12"><text:span text:style-name="T10">[ВСТАВЬ СЮДА ТЕКСТ РАЗДЕЛА "ЗАДАНИЕ"]</text:span></text:p>
      <text:p text:style-name="P12"><text:span text:style-name="T10">"""</text:span></text:p>
      <text:p text:style-name="P12"/>
      <text:p text:style-name="P12"><text:span text:style-name="T10">ГОСТ 19.505-79 требует 4 раздела: 1) назначение программы;</text:span></text:p>
      <text:p text:style-name="P12"><text:span text:style-name="T10">2) условия выполнения программы; 3) выполнение программы</text:span></text:p>
      <text:p text:style-name="P12"><text:span text:style-name="T10">(3.1 запуск, 3.2 описание операций, 3.3 завершение работы);</text:span></text:p>
      <text:p text:style-name="P12"><text:span text:style-name="T10">4) сообщения оператору.</text:span></text:p>
      <text:p text:style-name="P12"/>
      <text:p text:style-name="P12"><text:span text:style-name="T10">Заполни содержимое каждого раздела для указанной программы:</text:span></text:p>
      <text:p text:style-name="P12"><text:soft-page-break/></text:p>
      <text:p text:style-name="P12"><text:span text:style-name="T10">1. НАЗНАЧЕНИЕ ПРОГРАММЫ: полное название, версия, разработчик,</text:span></text:p>
      <text:p text:style-name="P12"><text:span text:style-name="T10">тип лицензии, назначение (1-2 предложения), 3-5 основных функций.</text:span></text:p>
      <text:p text:style-name="P12"/>
      <text:p text:style-name="P12"><text:span text:style-name="T10">2. УСЛОВИЯ ВЫПОЛНЕНИЯ ПРОГРАММЫ: заполни таблицу — ОС, минимальный</text:span></text:p>
      <text:p text:style-name="P12"><text:span text:style-name="T10">ОЗУ, место на диске, доп. ПО/зависимости, поддерживаемое</text:span></text:p>
      <text:p text:style-name="P12"><text:span text:style-name="T10">оборудование, права доступа пользователя.</text:span></text:p>
      <text:p text:style-name="P12"/>
      <text:p text:style-name="P12"><text:span text:style-name="T10">3. ВЫПОЛНЕНИЕ ПРОГРАММЫ:</text:span></text:p>
      <text:p text:style-name="P12"><text:span text:style-name="T10"><text:s text:c="3"/>3.1 — 2-3 реальных способа запуска этой программы в Ubuntu;</text:span></text:p>
      <text:p text:style-name="P12"><text:span text:style-name="T10"><text:s text:c="3"/>3.2 — таблицу из 5 строк "Операция | Действия пользователя |</text:span></text:p>
      <text:p text:style-name="P12"><text:span text:style-name="T10"><text:s text:c="9"/>Результат" для типичных операций именно этой программы;</text:span></text:p>
      <text:p text:style-name="P12"><text:span text:style-name="T10"><text:s text:c="3"/>3.3 — 2 реальных способа завершения работы программы.</text:span></text:p>
      <text:p text:style-name="P12"/>
      <text:p text:style-name="P12"><text:span text:style-name="T10">4. СООБЩЕНИЯ ОПЕРАТОРУ: 4 реальные типичные сообщения/ошибки этой</text:span></text:p>
      <text:p text:style-name="P12"><text:span text:style-name="T10">программы, их причину возникновения и действие пользователя.</text:span></text:p>
      <text:p text:style-name="P12"/>
      <text:p text:style-name="P12"><text:span text:style-name="T10">Ответ дай простым текстом по разделам (без markdown-таблиц,</text:span></text:p>
      <text:p text:style-name="P12"><text:span text:style-name="T10">просто переноси строки) — чтобы легко скопировать в LibreOffice</text:span></text:p>
      <text:p text:style-name="P12"><text:span text:style-name="T10">Writer и вставить вместо плейсхолдеров в готовом шаблон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3pt" fo:language="en" fo:country="US" style:letter-kerning="false" style:font-name-asian="Times New Roman2" style:font-size-asian="13pt" style:language-asian="zh" style:country-asian="CN" style:font-name-complex="Times New Roman2" style:font-size-complex="13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3pt" fo:language="en" fo:country="US" style:letter-kerning="false" style:font-name-asian="Times New Roman2" style:font-size-asian="13pt" style:language-asian="zh" style:country-asian="CN" style:font-name-complex="Times New Roman2" style:font-size-complex="13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665in" style:contextual-spacing="false"/>
      <style:text-properties style:font-name="Times New Roman1" fo:font-family="'Times New Roman'" style:font-family-generic="swiss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1252in" style:contextual-spacing="false"/>
      <style:text-properties style:font-name="Times New Roman1" fo:font-family="'Times New Roman'" style:font-family-generic="swiss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—" style:num-suffix="—" text:bullet-char="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Шаблон для квалификационного экзамена ПМ.04</meta:initial-creator>
    <dc:creator>Un-named</dc:creator>
    <meta:editing-cycles>1</meta:editing-cycles>
    <meta:creation-date>2026-06-28T20:53:14.316000000</meta:creation-date>
    <dc:date>2026-06-28T20:53:14.343000000</dc:date>
    <meta:document-statistic meta:table-count="3" meta:image-count="0" meta:object-count="0" meta:page-count="9" meta:paragraph-count="130" meta:word-count="718" meta:character-count="5565" meta:non-whitespace-character-count="4951"/>
    <meta:generator>LibreOffice/24.2.7.2$Linux_X86_64 LibreOffice_project/420$Build-2</meta:generator>
  </office:meta>
</office:document-meta>
</file>