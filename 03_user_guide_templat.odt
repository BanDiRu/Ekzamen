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0.0007in" fo:margin-top="0in" fo:margin-bottom="0in" table:align="left" style:writing-mode="page"/>
    </style:style>
    <style:style style:name="Table1.A" style:family="table-column">
      <style:table-column-properties style:column-width="2.6771in"/>
    </style:style>
    <style:style style:name="Table1.B" style:family="table-column">
      <style:table-column-properties style:column-width="4.0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1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A7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1.B7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" style:family="table">
      <style:table-properties style:width="6.6931in" fo:margin-left="0.0007in" fo:margin-top="0in" fo:margin-bottom="0in" table:align="left" style:writing-mode="page"/>
    </style:style>
    <style:style style:name="Table2.A" style:family="table-column">
      <style:table-column-properties style:column-width="2.007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0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2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A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B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2.C6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" style:family="table">
      <style:table-properties style:width="6.6931in" fo:margin-left="0.0007in" fo:margin-top="0in" fo:margin-bottom="0in" table:align="left" style:writing-mode="page"/>
    </style:style>
    <style:style style:name="Table3.A" style:family="table-column">
      <style:table-column-properties style:column-width="2.2083in"/>
    </style:style>
    <style:style style:name="Table3.B" style:family="table-column">
      <style:table-column-properties style:column-width="2.2757in"/>
    </style:style>
    <style:style style:name="Table3.C" style:family="table-column">
      <style:table-column-properties style:column-width="2.2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3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3.C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" style:family="table">
      <style:table-properties style:width="6.6931in" fo:margin-left="0.0007in" fo:margin-top="0in" fo:margin-bottom="0in" table:align="left" style:writing-mode="page"/>
    </style:style>
    <style:style style:name="Table4.A" style:family="table-column">
      <style:table-column-properties style:column-width="2.6771in"/>
    </style:style>
    <style:style style:name="Table4.B" style:family="table-column">
      <style:table-column-properties style:column-width="4.01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9e2f3" fo:padding-left="0.0833in" fo:padding-right="0.0833in" fo:padding-top="0.0556in" fo:padding-bottom="0.0556in" fo:border="0.1pt solid #999999">
        <style:background-image/>
      </style:table-cell-properties>
    </style:style>
    <style:style style:name="Table4.A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B2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A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B3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A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B4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A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Table4.B5" style:family="table-cell">
      <style:table-cell-properties style:vertical-align="middle" fo:padding-left="0.0833in" fo:padding-right="0.0833in" fo:padding-top="0.0556in" fo:padding-bottom="0.0556in" fo:border="0.1pt solid #999999"/>
    </style:style>
    <style:style style:name="P1" style:family="paragraph" style:parent-style-name="Heading_20_1">
      <style:paragraph-properties fo:margin-top="0in" fo:margin-bottom="0.1665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6"/>
    <style:style style:name="P7" style:family="paragraph" style:parent-style-name="Standard">
      <style:paragraph-properties fo:margin-top="0in" fo:margin-bottom="0.111in" style:contextual-spacing="false"/>
    </style:style>
    <style:style style:name="P8" style:family="paragraph" style:parent-style-name="Standard">
      <style:paragraph-properties fo:margin-top="0in" fo:margin-bottom="0.139in" style:contextual-spacing="false" fo:text-align="center" style:justify-single-word="false" fo:break-before="page"/>
    </style:style>
    <style:style style:name="P9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10" style:family="paragraph" style:parent-style-name="Standard">
      <style:paragraph-properties fo:margin-top="0in" fo:margin-bottom="0.0693in" style:contextual-spacing="false"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in" fo:margin-bottom="1.111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.0555in" style:contextual-spacing="false" fo:text-align="end" style:justify-single-word="false"/>
    </style:style>
    <style:style style:name="P14" style:family="paragraph" style:parent-style-name="Standard">
      <style:paragraph-properties fo:margin-top="0in" fo:margin-bottom="1.111in" style:contextual-spacing="false" fo:text-align="end" style:justify-single-word="false"/>
    </style:style>
    <style:style style:name="P15" style:family="paragraph" style:parent-style-name="Standard">
      <loext:graphic-properties draw:fill="solid" draw:fill-color="#f2f2f2"/>
      <style:paragraph-properties fo:margin-top="0in" fo:margin-bottom="0.028in" style:contextual-spacing="false" fo:background-color="#f2f2f2"/>
    </style:style>
    <style:style style:name="P16" style:family="paragraph" style:parent-style-name="Standard">
      <style:paragraph-properties fo:margin-top="0.139in" fo:margin-bottom="0.0693in" style:contextual-spacing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 ЭТОМ ФАЙЛЕ</text:h>
      <text:p text:style-name="P7"><text:span text:style-name="T1">Этот файл содержит ДВА самостоятельных варианта одного и того же «Руководства пользователя» — на случай, если ты не уверен(а), какой именно ГОСТ требует твой билет/преподаватель.</text:span></text:p>
      <text:list text:style-name="WWNum2">
        <text:list-item text:start-value="1">
          <text:p text:style-name="P2">ЧАСТЬ 1 — оформлена по ГОСТ 19.505-79 (формальное название документа — «Руководство оператора»), 4 раздела.</text:p>
        </text:list-item>
        <text:list-item>
          <text:p text:style-name="P2">ЧАСТЬ 2 — оформлена по ГОСТ Р 59795-2021 (документ из комплекса стандартов на автоматизированные системы), 6 разделов.</text:p>
        </text:list-item>
      </text:list>
      <text:p text:style-name="P7"><text:span text:style-name="T1">Выбери тот вариант, который соответствует формулировке твоего билета, заполни плейсхолдеры в нём, а второй вариант перед сдачей удали из файла (или просто не показывай эти страницы).</text:span></text:p>
      <text:p text:style-name="Standard"/>
      <text:p text:style-name="P8"><text:span text:style-name="T2">ЧАСТЬ 1</text:span></text:p>
      <text:p text:style-name="P10"><text:span text:style-name="T3">РУКОВОДСТВО ПОЛЬЗОВАТЕЛЯ</text:span></text:p>
      <text:p text:style-name="P11"><text:span text:style-name="T4">по ГОСТ 19.505-79 («Руководство оператора»)</text:span></text:p>
      <text:p text:style-name="Standard"/>
      <text:p text:style-name="P8"><text:span text:style-name="T6">[НАИМЕНОВАНИЕ ОБРАЗОВАТЕЛЬНОЙ ОРГАНИЗАЦИИ]</text:span></text:p>
      <text:p text:style-name="P12"><text:span text:style-name="T6">[Колледж / отделение]</text:span></text:p>
      <text:p text:style-name="P9"><text:span text:style-name="T7">РУКОВОДСТВО ПОЛЬЗОВАТЕЛЯ</text:span></text:p>
      <text:p text:style-name="P10"><text:span text:style-name="T4">(вид документа «Руководство оператора» по ГОСТ 19.505-79)</text:span></text:p>
      <text:p text:style-name="P12"><text:span text:style-name="T8">[НАЗВАНИЕ ПРОГРАММНОГО ОБЕСПЕЧЕНИЯ], версия [X.X]</text:span></text:p>
      <text:p text:style-name="P13"><text:span text:style-name="T5">Составил: [Фамилия И.О.]</text:span></text:p>
      <text:p text:style-name="P13"><text:span text:style-name="T5">Группа: [номер группы]</text:span></text:p>
      <text:p text:style-name="P14"><text:span text:style-name="T5">Экзаменационный билет № [номер]</text:span></text:p>
      <text:p text:style-name="P11"><text:span text:style-name="T5">[Москва, 2026]</text:span></text:p>
      <text:p text:style-name="Standard"/>
      <text:h text:style-name="P1" text:outline-level="1">АННОТАЦИЯ</text:h>
      <text:p text:style-name="P7"><text:span text:style-name="T1">Настоящий документ — руководство оператора для программы [НАЗВАНИЕ ПО] версии [X.X]. В документе приведены сведения о назначении программы, условиях её выполнения, порядке загрузки, запуска, использования и завершения работы, а также о сообщениях, которые программа выдаёт оператору. Содержание и оформление документа соответствуют ГОСТ 19.505-79 «Единая система программной документации (ЕСПД). Руководство оператора. Требования к содержанию и оформлению».</text:span></text:p>
      <text:p text:style-name="Standard"/>
      <text:h text:style-name="P1" text:outline-level="1">СОДЕРЖАНИЕ</text:h>
      <text:p text:style-name="P7"><text:span text:style-name="T1">Аннотация</text:span></text:p>
      <text:p text:style-name="P7"><text:span text:style-name="T1">1. Назначение программы</text:span></text:p>
      <text:p text:style-name="P7"><text:span text:style-name="T1">2. Условия выполнения программы</text:span></text:p>
      <text:p text:style-name="P7"><text:span text:style-name="T1">3. Выполнение программы</text:span></text:p>
      <text:p text:style-name="P7"><text:span text:style-name="T1"><text:s text:c="3"/>3.1 Загрузка и запуск программы</text:span></text:p>
      <text:p text:style-name="P7"><text:span text:style-name="T1"><text:s text:c="3"/>3.2 Описание операций (команды и ответы программы)</text:span></text:p>
      <text:p text:style-name="P7"><text:span text:style-name="T1"><text:s text:c="3"/>3.3 Завершение работы</text:span></text:p>
      <text:p text:style-name="P7"><text:span text:style-name="T1">4. Сообщения оператору</text:span></text:p>
      <text:p text:style-name="P7"><text:span text:style-name="T1">Приложение А. Скриншоты интерфейса программы</text:span></text:p>
      <text:p text:style-name="P7"><text:span text:style-name="T1">Приложение Б. Промпт для DeepSeek (служебная страница — удалить перед сдачей)</text:span></text:p>
      <text:p text:style-name="P7"><text:span text:style-name="T1">Справка. О стандарте ГОСТ 19.505-79 (необязательная страница)</text:span></text:p>
      <text:p text:style-name="Standard"/>
      <text:h text:style-name="P1" text:outline-level="1">1. НАЗНАЧЕНИЕ ПРОГРАММЫ</text:h>
      <text:p text:style-name="P7"><text:span text:style-name="T1">В разделе приведены сведения о назначении программы и информация, достаточная для понимания функций программы и её эксплуатации (п. 2.1 ГОСТ 19.505-79).</text:span></text:p>
      <text:list text:continue-numbering="true" text:style-name="WWNum2">
        <text:list-item>
          <text:p text:style-name="P2">Полное наименование: [точное название ПО]</text:p>
        </text:list-item>
        <text:list-item>
          <text:p text:style-name="P2">Версия: [X.X]</text:p>
        </text:list-item>
        <text:list-item>
          <text:p text:style-name="P2">Разработчик / правообладатель: [компания или сообщество]</text:p>
        </text:list-item>
        <text:list-item>
          <text:p text:style-name="P2">Тип распространения: [свободное ПО / open-source / лицензия X]</text:p>
        </text:list-item>
        <text:list-item>
          <text:p text:style-name="P2">Назначение программы: [1-2 предложения о том, для какой задачи предназначена программа]</text:p>
        </text:list-item>
      </text:list>
      <text:p text:style-name="P7"><text:span text:style-name="T1">Основные функции программы:</text:span></text:p>
      <text:list xml:id="list24329498969742" text:continue-numbering="true" text:style-name="WWNum2">
        <text:list-item>
          <text:p text:style-name="P2">[функция 1]</text:p>
        </text:list-item>
        <text:list-item>
          <text:p text:style-name="P2">[функция 2]</text:p>
        </text:list-item>
        <text:list-item>
          <text:p text:style-name="P2">[функция 3]</text:p>
        </text:list-item>
      </text:list>
      <text:h text:style-name="Heading_20_1" text:outline-level="1">2. УСЛОВИЯ ВЫПОЛНЕНИЯ ПРОГРАММЫ</text:h>
      <text:p text:style-name="P7"><text:span text:style-name="T1">В разделе указаны условия, необходимые для выполнения программы: минимальный и (или) максимальный состав аппаратных и программных средств (п. 2.2 ГОСТ 19.505-79)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9">Параметр</text:span></text:p>
          </table:table-cell>
          <table:table-cell table:style-name="Table1.A1" office:value-type="string">
            <text:p text:style-name="Standard"><text:span text:style-name="T9">Значение</text:span></text:p>
          </table:table-cell>
        </table:table-row>
        <table:table-row table:style-name="Table1.1">
          <table:table-cell table:style-name="Table1.A2" office:value-type="string">
            <text:p text:style-name="Standard">Операционная система</text:p>
          </table:table-cell>
          <table:table-cell table:style-name="Table1.B2" office:value-type="string">
            <text:p text:style-name="Standard">[например, Ubuntu 22.04 LTS и новее]</text:p>
          </table:table-cell>
        </table:table-row>
        <table:table-row table:style-name="Table1.1">
          <table:table-cell table:style-name="Table1.A3" office:value-type="string">
            <text:p text:style-name="Standard">Минимальный объём ОЗУ</text:p>
          </table:table-cell>
          <table:table-cell table:style-name="Table1.B3" office:value-type="string">
            <text:p text:style-name="Standard">[например, 2 ГБ]</text:p>
          </table:table-cell>
        </table:table-row>
        <table:table-row table:style-name="Table1.1">
          <table:table-cell table:style-name="Table1.A4" office:value-type="string">
            <text:p text:style-name="Standard">Свободное место на диске</text:p>
          </table:table-cell>
          <table:table-cell table:style-name="Table1.B4" office:value-type="string">
            <text:p text:style-name="Standard">[например, 1 ГБ]</text:p>
          </table:table-cell>
        </table:table-row>
        <table:table-row table:style-name="Table1.1">
          <table:table-cell table:style-name="Table1.A5" office:value-type="string">
            <text:p text:style-name="Standard">Дополнительное ПО / зависимости</text:p>
          </table:table-cell>
          <table:table-cell table:style-name="Table1.B5" office:value-type="string">
            <text:p text:style-name="Standard">[библиотеки, runtime, драйверы]</text:p>
          </table:table-cell>
        </table:table-row>
        <table:table-row table:style-name="Table1.1">
          <table:table-cell table:style-name="Table1.A6" office:value-type="string">
            <text:p text:style-name="Standard">Поддерживаемое оборудование</text:p>
          </table:table-cell>
          <table:table-cell table:style-name="Table1.B6" office:value-type="string">
            <text:p text:style-name="Standard">[если применимо: отладочная плата, программатор и т.п.]</text:p>
          </table:table-cell>
        </table:table-row>
        <table:table-row table:style-name="Table1.1">
          <table:table-cell table:style-name="Table1.A7" office:value-type="string">
            <text:p text:style-name="Standard">Права доступа пользователя</text:p>
          </table:table-cell>
          <table:table-cell table:style-name="Table1.B7" office:value-type="string">
            <text:p text:style-name="Standard">[например, права sudo для установки]</text:p>
          </table:table-cell>
        </table:table-row>
      </table:table>
      <text:p text:style-name="Standard"/>
      <text:h text:style-name="P1" text:outline-level="1">3. ВЫПОЛНЕНИЕ ПРОГРАММЫ</text:h>
      <text:p text:style-name="P7"><text:span text:style-name="T1">В разделе указана последовательность действий оператора, обеспечивающих загрузку, запуск, выполнение и завершение программы; приведено описание функций, формата и возможных вариантов команд, с помощью которых оператор управляет программой, а также ответы программы на эти команды (п. 2.3 ГОСТ 19.505-79).</text:span></text:p>
      <text:h text:style-name="Heading_20_2" text:outline-level="2">3.1 Загрузка и запуск программы</text:h>
      <text:list text:style-name="WWNum3">
        <text:list-item text:start-value="1">
          <text:p text:style-name="P3">[способ запуска 1 — например, через меню приложений: Приложения -&gt; ... -&gt; ...]</text:p>
        </text:list-item>
        <text:list-item>
          <text:p text:style-name="P3">[способ запуска 2 — например, через терминал: команда]</text:p>
        </text:list-item>
        <text:list-item>
          <text:p text:style-name="P3">[способ запуска 3 — например, ярлык на рабочем столе]</text:p>
        </text:list-item>
      </text:list>
      <text:h text:style-name="Heading_20_2" text:outline-level="2">3.2 Описание операций (команды и ответы программы)</text:h>
      <text:p text:style-name="P7"><text:span text:style-name="T1">Основные команды/действия оператора при работе с программой и реакция программы на них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9">Операция</text:span></text:p>
          </table:table-cell>
          <table:table-cell table:style-name="Table2.A1" office:value-type="string">
            <text:p text:style-name="Standard"><text:span text:style-name="T9">Действие оператора (команда)</text:span></text:p>
          </table:table-cell>
          <table:table-cell table:style-name="Table2.A1" office:value-type="string">
            <text:p text:style-name="Standard"><text:span text:style-name="T9">Ответ программы (результат)</text:span></text:p>
          </table:table-cell>
        </table:table-row>
        <table:table-row table:style-name="Table2.1">
          <table:table-cell table:style-name="Table2.A2" office:value-type="string">
            <text:p text:style-name="Standard">Создание нового проекта/файла</text:p>
          </table:table-cell>
          <table:table-cell table:style-name="Table2.B2" office:value-type="string">
            <text:p text:style-name="Standard">[Файл -&gt; Создать -&gt; ...]</text:p>
          </table:table-cell>
          <table:table-cell table:style-name="Table2.C2" office:value-type="string">
            <text:p text:style-name="Standard">[открывается новый проект]</text:p>
          </table:table-cell>
        </table:table-row>
        <table:table-row table:style-name="Table2.1">
          <table:table-cell table:style-name="Table2.A3" office:value-type="string">
            <text:p text:style-name="Standard">Открытие существующего файла</text:p>
          </table:table-cell>
          <table:table-cell table:style-name="Table2.B3" office:value-type="string">
            <text:p text:style-name="Standard">[Файл -&gt; Открыть -&gt; выбрать файл]</text:p>
          </table:table-cell>
          <table:table-cell table:style-name="Table2.C3" office:value-type="string">
            <text:p text:style-name="Standard">[файл загружается в рабочую область]</text:p>
          </table:table-cell>
        </table:table-row>
        <table:table-row table:style-name="Table2.1">
          <table:table-cell table:style-name="Table2.A4" office:value-type="string">
            <text:p text:style-name="Standard">[основная операция программы]</text:p>
          </table:table-cell>
          <table:table-cell table:style-name="Table2.B4" office:value-type="string">
            <text:p text:style-name="Standard">[описать главную функцию из задания билета]</text:p>
          </table:table-cell>
          <table:table-cell table:style-name="Table2.C4" office:value-type="string">
            <text:p text:style-name="Standard">[результат выполнения операции]</text:p>
          </table:table-cell>
        </table:table-row>
        <table:table-row table:style-name="Table2.1">
          <table:table-cell table:style-name="Table2.A5" office:value-type="string">
            <text:p text:style-name="Standard">Сохранение результата</text:p>
          </table:table-cell>
          <table:table-cell table:style-name="Table2.B5" office:value-type="string">
            <text:p text:style-name="Standard">Файл -&gt; Сохранить (Ctrl+S)</text:p>
          </table:table-cell>
          <table:table-cell table:style-name="Table2.C5" office:value-type="string">
            <text:p text:style-name="Standard">[файл сохранён]</text:p>
          </table:table-cell>
        </table:table-row>
        <table:table-row table:style-name="Table2.1">
          <table:table-cell table:style-name="Table2.A6" office:value-type="string">
            <text:p text:style-name="Standard">[дополнительная операция]</text:p>
          </table:table-cell>
          <table:table-cell table:style-name="Table2.B6" office:value-type="string">
            <text:p text:style-name="Standard">[действие оператора]</text:p>
          </table:table-cell>
          <table:table-cell table:style-name="Table2.C6" office:value-type="string">
            <text:p text:style-name="Standard">[ответ программы]</text:p>
          </table:table-cell>
        </table:table-row>
      </table:table>
      <text:h text:style-name="Heading_20_2" text:outline-level="2">3.3 Завершение работы</text:h>
      <text:list text:style-name="WWNum4">
        <text:list-item text:start-value="1">
          <text:p text:style-name="P4">[способ завершения 1 — например, Файл -&gt; Выход]</text:p>
        </text:list-item>
        <text:list-item>
          <text:p text:style-name="P4">[способ завершения 2 — например, сочетание клавиш]</text:p>
        </text:list-item>
      </text:list>
      <text:p text:style-name="Standard"/>
      <text:h text:style-name="P1" text:outline-level="1">4. СООБЩЕНИЯ ОПЕРАТОРУ</text:h>
      <text:p text:style-name="P7"><text:span text:style-name="T1">В разделе приведены тексты сообщений, выдаваемых в ходе выполнения программы, описание их содержания и соответствующие действия оператора, в том числе действия в случае сбоя и возможность повторного запуска программы (п. 2.5 ГОСТ 19.505-79)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9">Сообщение / текст</text:span></text:p>
          </table:table-cell>
          <table:table-cell table:style-name="Table3.A1" office:value-type="string">
            <text:p text:style-name="Standard"><text:span text:style-name="T9">Причина возникновения</text:span></text:p>
          </table:table-cell>
          <table:table-cell table:style-name="Table3.A1" office:value-type="string">
            <text:p text:style-name="Standard"><text:span text:style-name="T9">Действие оператора</text:span></text:p>
          </table:table-cell>
        </table:table-row>
        <table:table-row table:style-name="Table3.1">
          <table:table-cell table:style-name="Table3.A2" office:value-type="string">
            <text:p text:style-name="Standard">[сообщение 1]</text:p>
          </table:table-cell>
          <table:table-cell table:style-name="Table3.B2" office:value-type="string">
            <text:p text:style-name="Standard">[причина]</text:p>
          </table:table-cell>
          <table:table-cell table:style-name="Table3.C2" office:value-type="string">
            <text:p text:style-name="Standard">[действие]</text:p>
          </table:table-cell>
        </table:table-row>
        <table:table-row table:style-name="Table3.1">
          <table:table-cell table:style-name="Table3.A3" office:value-type="string">
            <text:p text:style-name="Standard">[сообщение 2]</text:p>
          </table:table-cell>
          <table:table-cell table:style-name="Table3.B3" office:value-type="string">
            <text:p text:style-name="Standard">[причина]</text:p>
          </table:table-cell>
          <table:table-cell table:style-name="Table3.C3" office:value-type="string">
            <text:p text:style-name="Standard">[действие]</text:p>
          </table:table-cell>
        </table:table-row>
        <table:table-row table:style-name="Table3.1">
          <table:table-cell table:style-name="Table3.A4" office:value-type="string">
            <text:p text:style-name="Standard">[сообщение 3]</text:p>
          </table:table-cell>
          <table:table-cell table:style-name="Table3.B4" office:value-type="string">
            <text:p text:style-name="Standard">[причина]</text:p>
          </table:table-cell>
          <table:table-cell table:style-name="Table3.C4" office:value-type="string">
            <text:p text:style-name="Standard">[действие]</text:p>
          </table:table-cell>
        </table:table-row>
        <table:table-row table:style-name="Table3.1">
          <table:table-cell table:style-name="Table3.A5" office:value-type="string">
            <text:p text:style-name="Standard">[сообщение об ошибке / сбое]</text:p>
          </table:table-cell>
          <table:table-cell table:style-name="Table3.B5" office:value-type="string">
            <text:p text:style-name="Standard">[причина сбоя]</text:p>
          </table:table-cell>
          <table:table-cell table:style-name="Table3.C5" office:value-type="string">
            <text:p text:style-name="Standard">[как перезапустить программу]</text:p>
          </table:table-cell>
        </table:table-row>
      </table:table>
      <text:p text:style-name="P7"><text:span text:style-name="T10">Допускается иллюстрировать содержание разделов поясняющими примерами, таблицами, схемами и графиками (п. 2.6 ГОСТ 19.505-79).</text:span></text:p>
      <text:p text:style-name="Standard"/>
      <text:h text:style-name="P1" text:outline-level="1">ПРИЛОЖЕНИЕ А. Скриншоты интерфейса программы</text:h>
      <text:p text:style-name="P7"><text:span text:style-name="T1">В приложение включены материалы, которые нецелесообразно включать непосредственно в разделы руководства (п. 2.7 ГОСТ 19.505-79).</text:span></text:p>
      <text:p text:style-name="P7"><text:span text:style-name="T10">[Вставить 2-3 скриншота: сделать снимок экрана (Print Screen) -&gt; Вставка -&gt; Рисунок]</text:span></text:p>
      <text:p text:style-name="Standard"/>
      <text:h text:style-name="P1" text:outline-level="1">ПРИЛОЖЕНИЕ Б. Промпт для DeepSeek (к Части 1, ГОСТ 19.505-79)</text:h>
      <text:p text:style-name="P7"><text:span text:style-name="T11">Эта страница — служебная, для подготовки текста разделов 1-4. Перед сдачей готового документа преподавателю эту страницу нужно удалить.</text:span></text:p>
      <text:p text:style-name="P7"><text:span text:style-name="T1">Как использовать: скопируй промпт ниже целиком, вставь вместо плейсхолдеров название программы и текст задания из билета, отправь в DeepSeek. Полученный текст вставь в разделы 1-4 этого документа вместо квадратных плейсхолдеров.</text:span></text:p>
      <text:p text:style-name="P15"><text:span text:style-name="T12">Ты помогаешь составить «Руководство пользователя» по ГОСТ 19.505-79</text:span></text:p>
      <text:p text:style-name="P15"><text:span text:style-name="T12">для квалификационного экзамена по ПМ.04 «Сопровождение и обслуживание</text:span></text:p>
      <text:p text:style-name="P15"><text:span text:style-name="T12">программного обеспечения» (спец. 09.02.07).</text:span></text:p>
      <text:p text:style-name="P15"/>
      <text:p text:style-name="P15"><text:span text:style-name="T12">ПРОГРАММА, для которой нужно написать руководство:</text:span></text:p>
      <text:p text:style-name="P15"><text:span text:style-name="T12">[НАЗВАНИЕ ПРОГРАММЫ И ВЕРСИЯ]</text:span></text:p>
      <text:p text:style-name="P15"/>
      <text:p text:style-name="P15"><text:span text:style-name="T12">ТЕКСТ ЗАДАНИЯ ИЗ БИЛЕТА (вставь как в билете):</text:span></text:p>
      <text:p text:style-name="P15"><text:span text:style-name="T12">"""</text:span></text:p>
      <text:p text:style-name="P15"><text:span text:style-name="T12">[ВСТАВЬ СЮДА ТЕКСТ РАЗДЕЛА "ЗАДАНИЕ"]</text:span></text:p>
      <text:p text:style-name="P15"><text:span text:style-name="T12">"""</text:span></text:p>
      <text:p text:style-name="P15"/>
      <text:p text:style-name="P15"><text:span text:style-name="T12">ГОСТ 19.505-79 требует 4 раздела: 1) назначение программы;</text:span></text:p>
      <text:p text:style-name="P15"><text:span text:style-name="T12">2) условия выполнения программы; 3) выполнение программы</text:span></text:p>
      <text:p text:style-name="P15"><text:span text:style-name="T12">(3.1 загрузка и запуск, 3.2 описание операций — команды и</text:span></text:p>
      <text:p text:style-name="P15"><text:span text:style-name="T12">ответы программы, 3.3 завершение работы); 4) сообщения оператору.</text:span></text:p>
      <text:p text:style-name="P15"/>
      <text:p text:style-name="P15"><text:span text:style-name="T12">Заполни содержимое каждого раздела для указанной программы:</text:span></text:p>
      <text:p text:style-name="P15"><text:soft-page-break/></text:p>
      <text:p text:style-name="P15"><text:span text:style-name="T12">1. НАЗНАЧЕНИЕ ПРОГРАММЫ: полное название, версия, разработчик,</text:span></text:p>
      <text:p text:style-name="P15"><text:span text:style-name="T12">тип лицензии, назначение (1-2 предложения), 3-5 основных функций.</text:span></text:p>
      <text:p text:style-name="P15"/>
      <text:p text:style-name="P15"><text:span text:style-name="T12">2. УСЛОВИЯ ВЫПОЛНЕНИЯ ПРОГРАММЫ: заполни таблицу — ОС, минимальный</text:span></text:p>
      <text:p text:style-name="P15"><text:span text:style-name="T12">ОЗУ, место на диске, доп. ПО/зависимости, поддерживаемое</text:span></text:p>
      <text:p text:style-name="P15"><text:span text:style-name="T12">оборудование, права доступа пользователя.</text:span></text:p>
      <text:p text:style-name="P15"/>
      <text:p text:style-name="P15"><text:span text:style-name="T12">3. ВЫПОЛНЕНИЕ ПРОГРАММЫ:</text:span></text:p>
      <text:p text:style-name="P15"><text:span text:style-name="T12"><text:s text:c="3"/>3.1 — 2-3 реальных способа загрузки и запуска этой программы</text:span></text:p>
      <text:p text:style-name="P15"><text:span text:style-name="T12"><text:s text:c="9"/>в Ubuntu;</text:span></text:p>
      <text:p text:style-name="P15"><text:span text:style-name="T12"><text:s text:c="3"/>3.2 — таблицу из 5 строк "Операция | Действие оператора</text:span></text:p>
      <text:p text:style-name="P15"><text:span text:style-name="T12"><text:s text:c="9"/>(команда) | Ответ программы" для типичных команд именно</text:span></text:p>
      <text:p text:style-name="P15"><text:span text:style-name="T12"><text:s text:c="9"/>этой программы;</text:span></text:p>
      <text:p text:style-name="P15"><text:span text:style-name="T12"><text:s text:c="3"/>3.3 — 2 реальных способа завершения работы программы.</text:span></text:p>
      <text:p text:style-name="P15"/>
      <text:p text:style-name="P15"><text:span text:style-name="T12">4. СООБЩЕНИЯ ОПЕРАТОРУ: 4 реальные типичные сообщения/ошибки этой</text:span></text:p>
      <text:p text:style-name="P15"><text:span text:style-name="T12">программы, их причину возникновения и действие оператора (включая</text:span></text:p>
      <text:p text:style-name="P15"><text:span text:style-name="T12">действия при сбое и перезапуск программы).</text:span></text:p>
      <text:p text:style-name="P15"/>
      <text:p text:style-name="P15"><text:span text:style-name="T12">Ответ дай простым текстом по разделам (без markdown-таблиц,</text:span></text:p>
      <text:p text:style-name="P15"><text:soft-page-break/><text:span text:style-name="T12">просто переноси строки) — чтобы легко скопировать в LibreOffice</text:span></text:p>
      <text:p text:style-name="P15"><text:span text:style-name="T12">Writer и вставить вместо плейсхолдеров в готовом шаблоне.</text:span></text:p>
      <text:p text:style-name="Standard"/>
      <text:h text:style-name="P1" text:outline-level="1">СПРАВКА. О стандарте ГОСТ 19.505-79</text:h>
      <text:p text:style-name="P7"><text:span text:style-name="T11">Эта страница не требуется самим ГОСТом — это справочная информация для тебя. Можешь оставить её в итоговом документе или удалить перед сдачей.</text:span></text:p>
      <text:p text:style-name="P7"><text:span text:style-name="T1">Полное название: межгосударственный стандарт ГОСТ 19.505-79 «Единая система программной документации (ЕСПД). Руководство оператора. Требования к содержанию и оформлению».</text:span></text:p>
      <text:p text:style-name="P7"><text:span text:style-name="T1">Когда принят: постановлением Госстандарта СССР от 12 января 1979 г. № 74, действует с 1 января 1980 г.; в 1981 году вышло Изменение № 1, которое уточнило формулировки нескольких пунктов.</text:span></text:p>
      <text:p text:style-name="P7"><text:span text:style-name="T1">Что регулирует: стандарт входит в комплекс ГОСТ серии 19 — Единую систему программной документации (ЕСПД), которая описывает виды программных документов и требования к ним. Этот конкретный ГОСТ задаёт состав и оформление документа «Руководство оператора» — в современной учебной практике этот же тип документа часто называют «руководством пользователя».</text:span></text:p>
      <text:p text:style-name="P7"><text:span text:style-name="T1">Какие разделы требует:</text:span></text:p>
      <text:list text:continue-list="list24329498969742" text:style-name="WWNum2">
        <text:list-item>
          <text:p text:style-name="P2">назначение программы;</text:p>
        </text:list-item>
        <text:list-item>
          <text:p text:style-name="P2">условия выполнения программы;</text:p>
        </text:list-item>
        <text:list-item>
          <text:p text:style-name="P2">выполнение программы;</text:p>
        </text:list-item>
        <text:list-item>
          <text:p text:style-name="P2">сообщения оператору.</text:p>
        </text:list-item>
      </text:list>
      <text:p text:style-name="P7"><text:span text:style-name="T1">Аннотация и содержание (информационная часть документа) — обязательны. Разделы можно объединять или вводить новые, если того требуют особенности конкретной программы. Допускается иллюстрировать материал примерами, таблицами, схемами и графиками, а вспомогательные материалы выносить в приложения.</text:span></text:p>
      <text:p text:style-name="P7"><text:span text:style-name="T1">Что должно быть в каждом разделе (кратко):</text:span></text:p>
      <text:list text:continue-numbering="true" text:style-name="WWNum2">
        <text:list-item>
          <text:p text:style-name="P2">«Назначение программы» — сведения о назначении и функциях программы, достаточные для понимания того, как её эксплуатировать.</text:p>
        </text:list-item>
        <text:list-item>
          <text:p text:style-name="P2">«Условия выполнения программы» — минимальный и (или) максимальный состав необходимых аппаратных и программных средств.</text:p>
        </text:list-item>
        <text:list-item>
          <text:p text:style-name="P2">«Выполнение программы» — последовательность действий оператора по загрузке, запуску, использованию и завершению программы; описание команд и того, как программа на них отвечает.</text:p>
        </text:list-item>
        <text:list-item>
          <text:p text:style-name="P2">«Сообщения оператору» — тексты сообщений программы, их смысл и действия оператора в ответ, включая действия при сбое и повторный запуск.</text:p>
        </text:list-item>
      </text:list>
      <text:p text:style-name="P7"><text:span text:style-name="T1">Статус сегодня: формально стандарт не отменён и остаётся действующим документом серии ЕСПД, поэтому учебные заведения и часть организаций продолжают ссылаться на него при оформлении документации к программам. Для документации автоматизированных систем (а не отдельных программ) сегодня часто применяют другой, более новый стандарт — ГОСТ Р 59795-2021 (см. Часть 2 этого файла); у него другая структура разделов, путать его с ГОСТ 19.505-79 не нужно.</text:span></text:p>
      <text:p text:style-name="Standard"/>
      <text:p text:style-name="P8"><text:span text:style-name="T2">ЧАСТЬ 2</text:span></text:p>
      <text:p text:style-name="P10"><text:span text:style-name="T3">РУКОВОДСТВО ПОЛЬЗОВАТЕЛЯ</text:span></text:p>
      <text:p text:style-name="P11"><text:span text:style-name="T4">по ГОСТ Р 59795-2021</text:span></text:p>
      <text:p text:style-name="Standard"/>
      <text:p text:style-name="P8"><text:span text:style-name="T6">[НАИМЕНОВАНИЕ ОБРАЗОВАТЕЛЬНОЙ ОРГАНИЗАЦИИ]</text:span></text:p>
      <text:p text:style-name="P12"><text:span text:style-name="T6">[Колледж / отделение]</text:span></text:p>
      <text:p text:style-name="P9"><text:span text:style-name="T7">РУКОВОДСТВО ПОЛЬЗОВАТЕЛЯ</text:span></text:p>
      <text:p text:style-name="P10"><text:span text:style-name="T4">(оформлено по ГОСТ Р 59795-2021)</text:span></text:p>
      <text:p text:style-name="P12"><text:span text:style-name="T8">[НАЗВАНИЕ ПРОГРАММНОГО ОБЕСПЕЧЕНИЯ], версия [X.X]</text:span></text:p>
      <text:p text:style-name="P13"><text:span text:style-name="T5">Составил: [Фамилия И.О.]</text:span></text:p>
      <text:p text:style-name="P13"><text:span text:style-name="T5">Группа: [номер группы]</text:span></text:p>
      <text:p text:style-name="P14"><text:span text:style-name="T5">Экзаменационный билет № [номер]</text:span></text:p>
      <text:p text:style-name="P11"><text:span text:style-name="T5">[Москва, 2026]</text:span></text:p>
      <text:p text:style-name="Standard"/>
      <text:h text:style-name="P1" text:outline-level="1">АННОТАЦИЯ</text:h>
      <text:p text:style-name="P7"><text:span text:style-name="T1">Настоящий документ — руководство пользователя для программы [НАЗВАНИЕ ПО] версии [X.X]. В документе приведены сведения о назначении и условиях применения программы, порядке подготовки к работе, описание выполняемых операций, действия в аварийных ситуациях и рекомендации по освоению. Содержание и оформление документа соответствуют ГОСТ Р 59795-2021 «Информационные технологии. Комплекс стандартов на автоматизированные системы. Автоматизированные системы. Требования к содержанию документов» (п. 6.4).</text:span></text:p>
      <text:p text:style-name="Standard"/>
      <text:h text:style-name="P1" text:outline-level="1">СОДЕРЖАНИЕ</text:h>
      <text:p text:style-name="P7"><text:span text:style-name="T1">Аннотация</text:span></text:p>
      <text:p text:style-name="P7"><text:span text:style-name="T1">Введение</text:span></text:p>
      <text:p text:style-name="P7"><text:span text:style-name="T1">1. Назначение и условия применения</text:span></text:p>
      <text:p text:style-name="P7"><text:span text:style-name="T1"><text:s text:c="3"/>1.1 Назначение</text:span></text:p>
      <text:p text:style-name="P7"><text:span text:style-name="T1"><text:s text:c="3"/>1.2 Условия применения</text:span></text:p>
      <text:p text:style-name="P7"><text:span text:style-name="T1">2. Подготовка к работе</text:span></text:p>
      <text:p text:style-name="P7"><text:span text:style-name="T1">3. Описание операций</text:span></text:p>
      <text:p text:style-name="P7"><text:span text:style-name="T1">4. Аварийные ситуации</text:span></text:p>
      <text:p text:style-name="P7"><text:span text:style-name="T1">5. Рекомендации по освоению</text:span></text:p>
      <text:p text:style-name="P7"><text:span text:style-name="T1">Приложение А2. Скриншоты интерфейса программы</text:span></text:p>
      <text:p text:style-name="P7"><text:span text:style-name="T1">Приложение Б2. Промпт для DeepSeek (служебная страница — удалить перед сдачей)</text:span></text:p>
      <text:p text:style-name="P7"><text:span text:style-name="T1">Справка. О стандарте ГОСТ Р 59795-2021 (необязательная страница)</text:span></text:p>
      <text:p text:style-name="Standard"/>
      <text:h text:style-name="P1" text:outline-level="1">ВВЕДЕНИЕ</text:h>
      <text:p text:style-name="P7"><text:span text:style-name="T1">В разделе приводят: краткое описание возможностей программы, требуемый уровень подготовки пользователя и перечень эксплуатационной документации, с которой пользователю необходимо ознакомиться (п. 6.4.2 ГОСТ Р 59795-2021).</text:span></text:p>
      <text:list text:continue-numbering="true" text:style-name="WWNum2">
        <text:list-item>
          <text:p text:style-name="P2">Краткое описание возможностей программы: [1-2 предложения о ключевых возможностях]</text:p>
        </text:list-item>
        <text:list-item>
          <text:p text:style-name="P2">Уровень подготовки пользователя: [например, базовые навыки работы с Linux/терминалом]</text:p>
        </text:list-item>
        <text:list-item>
          <text:p text:style-name="P2">Документация, с которой нужно ознакомиться: [название других документов/инструкций, если есть]</text:p>
        </text:list-item>
      </text:list>
      <text:h text:style-name="Heading_20_1" text:outline-level="1">1. НАЗНАЧЕНИЕ И УСЛОВИЯ ПРИМЕНЕНИЯ</text:h>
      <text:p text:style-name="P7"><text:span text:style-name="T1">В разделе приводят назначение программы и условия её применения в соответствии с назначением (п. 6.4.3 ГОСТ Р 59795-2021).</text:span></text:p>
      <text:h text:style-name="Heading_20_2" text:outline-level="2">1.1 Назначение</text:h>
      <text:list text:continue-numbering="true" text:style-name="WWNum2">
        <text:list-item>
          <text:p text:style-name="P2">Полное наименование: [точное название ПО]</text:p>
        </text:list-item>
        <text:list-item>
          <text:p text:style-name="P2">Версия: [X.X]</text:p>
        </text:list-item>
        <text:list-item>
          <text:p text:style-name="P2">Назначение программы: [для какой задачи предназначена, какие проблемы решает]</text:p>
        </text:list-item>
      </text:list>
      <text:p text:style-name="P7"><text:span text:style-name="T1">Основные функции:</text:span></text:p>
      <text:list text:continue-numbering="true" text:style-name="WWNum2">
        <text:list-item>
          <text:p text:style-name="P2">[функция 1]</text:p>
        </text:list-item>
        <text:list-item>
          <text:p text:style-name="P2">[функция 2]</text:p>
        </text:list-item>
        <text:list-item>
          <text:p text:style-name="P2">[функция 3]</text:p>
        </text:list-item>
      </text:list>
      <text:h text:style-name="Heading_20_2" text:outline-level="2">1.2 Условия применения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9">Параметр</text:span></text:p>
          </table:table-cell>
          <table:table-cell table:style-name="Table4.A1" office:value-type="string">
            <text:p text:style-name="Standard"><text:span text:style-name="T9">Значение</text:span></text:p>
          </table:table-cell>
        </table:table-row>
        <table:table-row table:style-name="Table4.1">
          <table:table-cell table:style-name="Table4.A2" office:value-type="string">
            <text:p text:style-name="Standard">Характеристики и конфигурация технических средств</text:p>
          </table:table-cell>
          <table:table-cell table:style-name="Table4.B2" office:value-type="string">
            <text:p text:style-name="Standard">[минимальные требования к ПК/ВМ: ОЗУ, диск, CPU]</text:p>
          </table:table-cell>
        </table:table-row>
        <table:table-row table:style-name="Table4.1">
          <table:table-cell table:style-name="Table4.A3" office:value-type="string">
            <text:p text:style-name="Standard">Операционная среда и общесистемное ПО</text:p>
          </table:table-cell>
          <table:table-cell table:style-name="Table4.B3" office:value-type="string">
            <text:p text:style-name="Standard">[например, Ubuntu 22.04 LTS + зависимости]</text:p>
          </table:table-cell>
        </table:table-row>
        <table:table-row table:style-name="Table4.1">
          <table:table-cell table:style-name="Table4.A4" office:value-type="string">
            <text:p text:style-name="Standard">Входная информация</text:p>
          </table:table-cell>
          <table:table-cell table:style-name="Table4.B4" office:value-type="string">
            <text:p text:style-name="Standard">[какие файлы/данные программа принимает на вход]</text:p>
          </table:table-cell>
        </table:table-row>
        <table:table-row table:style-name="Table4.1">
          <table:table-cell table:style-name="Table4.A5" office:value-type="string">
            <text:p text:style-name="Standard">Требования к подготовке специалистов</text:p>
          </table:table-cell>
          <table:table-cell table:style-name="Table4.B5" office:value-type="string">
            <text:p text:style-name="Standard">[какие знания/права нужны пользователю]</text:p>
          </table:table-cell>
        </table:table-row>
      </table:table>
      <text:p text:style-name="Standard"><text:soft-page-break/></text:p>
      <text:h text:style-name="P1" text:outline-level="1">2. ПОДГОТОВКА К РАБОТЕ</text:h>
      <text:p text:style-name="P7"><text:span text:style-name="T1">В разделе приводят состав и содержание носителя данных с загружаемыми программой и данными, порядок их загрузки и порядок проверки работоспособности (п. 6.4.4 ГОСТ Р 59795-2021).</text:span></text:p>
      <text:list text:continue-numbering="true" text:style-name="WWNum2">
        <text:list-item>
          <text:p text:style-name="P2">Состав и содержание носителя данных: [например, .deb/.AppImage-файл, репозиторий apt/snap]</text:p>
        </text:list-item>
        <text:list-item>
          <text:p text:style-name="P2">Порядок загрузки программы и данных: [конкретные команды/шаги установки]</text:p>
        </text:list-item>
        <text:list-item>
          <text:p text:style-name="P2">Порядок проверки работоспособности: [как убедиться, что программа установлена и запускается корректно (например, команда --version)]</text:p>
        </text:list-item>
      </text:list>
      <text:h text:style-name="Heading_20_1" text:outline-level="1">3. ОПИСАНИЕ ОПЕРАЦИЙ</text:h>
      <text:p text:style-name="P7"><text:span text:style-name="T1">В разделе приводят описание всех выполняемых функций, задач и процедур, а также операций технологического процесса обработки данных, необходимых для их выполнения. Для каждой операции указывают: наименование; условия, при соблюдении которых возможно её выполнение; подготовительные действия; основные действия в требуемой последовательности; заключительные действия; используемые ресурсы (п. 6.4.5-6.4.6 ГОСТ Р 59795-2021).</text:span></text:p>
      <text:p text:style-name="P16"><text:span text:style-name="T13">3.1 [Название операции 1 — например, главная функция из задания билета]</text:span></text:p>
      <text:list xml:id="list24328611786687" text:continue-numbering="true" text:style-name="WWNum2">
        <text:list-item>
          <text:p text:style-name="P2">Условия выполнения: [что должно быть готово/настроено перед началом]</text:p>
        </text:list-item>
        <text:list-item>
          <text:p text:style-name="P2">Подготовительные действия: [что сделать перед основными действиями]</text:p>
        </text:list-item>
      </text:list>
      <text:p text:style-name="P7"><text:span text:style-name="T1">Основные действия (в последовательности):</text:span></text:p>
      <text:list text:style-name="WWNum5">
        <text:list-item text:start-value="1">
          <text:p text:style-name="P5">[действие 1]</text:p>
        </text:list-item>
        <text:list-item>
          <text:p text:style-name="P5">[действие 2]</text:p>
        </text:list-item>
        <text:list-item>
          <text:p text:style-name="P5">[действие 3]</text:p>
        </text:list-item>
      </text:list>
      <text:list text:continue-list="list24328611786687" text:style-name="WWNum2">
        <text:list-item>
          <text:p text:style-name="P2">Заключительные действия: [что сделать после выполнения (сохранить, закрыть и т.п.)]</text:p>
        </text:list-item>
        <text:list-item>
          <text:p text:style-name="P2">Используемые ресурсы: [время, память, файлы, доступ в сеть и т.п.]</text:p>
        </text:list-item>
      </text:list>
      <text:p text:style-name="P16"><text:span text:style-name="T13">3.2 [Название операции 2]</text:span></text:p>
      <text:list xml:id="list24329370107129" text:continue-numbering="true" text:style-name="WWNum2">
        <text:list-item>
          <text:p text:style-name="P2">Условия выполнения: [...]</text:p>
        </text:list-item>
        <text:list-item>
          <text:p text:style-name="P2">Подготовительные действия: [...]</text:p>
        </text:list-item>
      </text:list>
      <text:p text:style-name="P7"><text:span text:style-name="T1">Основные действия (в последовательности):</text:span></text:p>
      <text:list text:style-name="WWNum6">
        <text:list-item text:start-value="1">
          <text:p text:style-name="P6">[действие 1]</text:p>
        </text:list-item>
        <text:list-item>
          <text:p text:style-name="P6"><text:soft-page-break/>[действие 2]</text:p>
        </text:list-item>
      </text:list>
      <text:list text:continue-list="list24329370107129" text:style-name="WWNum2">
        <text:list-item>
          <text:p text:style-name="P2">Заключительные действия: [...]</text:p>
        </text:list-item>
        <text:list-item>
          <text:p text:style-name="P2">Используемые ресурсы: [...]</text:p>
        </text:list-item>
      </text:list>
      <text:p text:style-name="P7"><text:span text:style-name="T10">Скопируй блок 3.1/3.2 для каждой дополнительной операции/функции программы.</text:span></text:p>
      <text:p text:style-name="Standard"/>
      <text:h text:style-name="P1" text:outline-level="1">4. АВАРИЙНЫЕ СИТУАЦИИ</text:h>
      <text:p text:style-name="P7"><text:span text:style-name="T1">В разделе приводят действия пользователя в нештатных ситуациях (п. 6.4.7 ГОСТ Р 59795-2021).</text:span></text:p>
      <text:h text:style-name="Heading_20_2" text:outline-level="2">4.1 Несоблюдение условий выполнения технологического процесса</text:h>
      <text:p text:style-name="P7"><text:span text:style-name="T1">[действия при длительных отказах технических средств — например, что делать, если зависла ВМ или не отвечает программа]</text:span></text:p>
      <text:h text:style-name="Heading_20_2" text:outline-level="2">4.2 Восстановление программ и (или) данных</text:h>
      <text:p text:style-name="P7"><text:span text:style-name="T1">[действия при отказе носителей данных или обнаружении ошибок в данных — например, восстановление из бэкапа/снапшота]</text:span></text:p>
      <text:h text:style-name="Heading_20_2" text:outline-level="2">4.3 Обнаружение несанкционированного доступа к данным</text:h>
      <text:p text:style-name="P7"><text:span text:style-name="T1">[действия при обнаружении несанкционированного доступа — например, к кому обращаться, как зафиксировать инцидент]</text:span></text:p>
      <text:h text:style-name="Heading_20_2" text:outline-level="2">4.4 Другие аварийные ситуации</text:h>
      <text:p text:style-name="P7"><text:span text:style-name="T1">[прочие нештатные ситуации, характерные именно для этой программы]</text:span></text:p>
      <text:h text:style-name="Heading_20_1" text:outline-level="1">5. РЕКОМЕНДАЦИИ ПО ОСВОЕНИЮ</text:h>
      <text:p text:style-name="P7"><text:span text:style-name="T1">В разделе приводят рекомендации по освоению и эксплуатации программы, включая описание контрольного примера, правила его запуска и выполнения (п. 6.4.8 ГОСТ Р 59795-2021).</text:span></text:p>
      <text:list text:continue-numbering="true" text:style-name="WWNum2">
        <text:list-item>
          <text:p text:style-name="P2">Рекомендации по освоению: [с чего начать новому пользователю, на что обратить внимание]</text:p>
        </text:list-item>
        <text:list-item>
          <text:p text:style-name="P2">Контрольный пример: [описание тестового файла/проекта/задачи для проверки программы]</text:p>
        </text:list-item>
        <text:list-item>
          <text:p text:style-name="P2">Правила запуска контрольного примера: [шаги]</text:p>
        </text:list-item>
        <text:list-item>
          <text:p text:style-name="P2">Правила выполнения контрольного примера: [ожидаемый результат, по которому можно убедиться, что всё работает верно]</text:p>
        </text:list-item>
      </text:list>
      <text:p text:style-name="Standard"/>
      <text:h text:style-name="P1" text:outline-level="1">ПРИЛОЖЕНИЕ А2. Скриншоты интерфейса программы</text:h>
      <text:p text:style-name="P7"><text:span text:style-name="T10">[Вставить 2-3 скриншота: сделать снимок экрана (Print Screen) -&gt; Вставка -&gt; Рисунок]</text:span></text:p>
      <text:p text:style-name="Standard"/>
      <text:h text:style-name="P1" text:outline-level="1">ПРИЛОЖЕНИЕ Б2. Промпт для DeepSeek (к Части 2, ГОСТ Р 59795-2021)</text:h>
      <text:p text:style-name="P7"><text:span text:style-name="T11">Эта страница — служебная. Перед сдачей готового документа преподавателю эту страницу нужно удалить.</text:span></text:p>
      <text:p text:style-name="P7"><text:span text:style-name="T1">Как использовать: скопируй промпт ниже целиком, вставь вместо плейсхолдеров название программы и текст задания из билета, отправь в DeepSeek. Полученный текст вставь в разделы этого документа вместо квадратных плейсхолдеров.</text:span></text:p>
      <text:p text:style-name="P15"><text:span text:style-name="T12">Ты помогаешь составить «Руководство пользователя» по ГОСТ Р 59795-2021</text:span></text:p>
      <text:p text:style-name="P15"><text:span text:style-name="T12">(п. 6.4) для квалификационного экзамена по ПМ.04 «Сопровождение и</text:span></text:p>
      <text:p text:style-name="P15"><text:span text:style-name="T12">обслуживание программного обеспечения» (спец. 09.02.07).</text:span></text:p>
      <text:p text:style-name="P15"/>
      <text:p text:style-name="P15"><text:span text:style-name="T12">ПРОГРАММА, для которой нужно написать руководство:</text:span></text:p>
      <text:p text:style-name="P15"><text:span text:style-name="T12">[НАЗВАНИЕ ПРОГРАММЫ И ВЕРСИЯ]</text:span></text:p>
      <text:p text:style-name="P15"/>
      <text:p text:style-name="P15"><text:span text:style-name="T12">ТЕКСТ ЗАДАНИЯ ИЗ БИЛЕТА (вставь как в билете):</text:span></text:p>
      <text:p text:style-name="P15"><text:span text:style-name="T12">"""</text:span></text:p>
      <text:p text:style-name="P15"><text:span text:style-name="T12">[ВСТАВЬ СЮДА ТЕКСТ РАЗДЕЛА "ЗАДАНИЕ"]</text:span></text:p>
      <text:p text:style-name="P15"><text:span text:style-name="T12">"""</text:span></text:p>
      <text:p text:style-name="P15"/>
      <text:p text:style-name="P15"><text:span text:style-name="T12">ГОСТ Р 59795-2021 требует 6 разделов: введение; назначение и</text:span></text:p>
      <text:p text:style-name="P15"><text:span text:style-name="T12">условия применения; подготовка к работе; описание операций;</text:span></text:p>
      <text:p text:style-name="P15"><text:span text:style-name="T12">аварийные ситуации; рекомендации по освоению.</text:span></text:p>
      <text:p text:style-name="P15"/>
      <text:p text:style-name="P15"><text:span text:style-name="T12">Заполни содержимое каждого раздела для указанной программы:</text:span></text:p>
      <text:p text:style-name="P15"/>
      <text:p text:style-name="P15"><text:soft-page-break/><text:span text:style-name="T12">ВВЕДЕНИЕ: краткое описание возможностей программы, нужный уровень</text:span></text:p>
      <text:p text:style-name="P15"><text:span text:style-name="T12">подготовки пользователя, документы для ознакомления.</text:span></text:p>
      <text:p text:style-name="P15"/>
      <text:p text:style-name="P15"><text:span text:style-name="T12">1. НАЗНАЧЕНИЕ И УСЛОВИЯ ПРИМЕНЕНИЯ: назначение, основные функции</text:span></text:p>
      <text:p text:style-name="P15"><text:span text:style-name="T12">(1.1); требования к технике, ОС, входным данным, подготовке</text:span></text:p>
      <text:p text:style-name="P15"><text:span text:style-name="T12">пользователя — таблицей (1.2).</text:span></text:p>
      <text:p text:style-name="P15"/>
      <text:p text:style-name="P15"><text:span text:style-name="T12">2. ПОДГОТОВКА К РАБОТЕ: откуда брать программу (apt/snap/deb/сайт),</text:span></text:p>
      <text:p text:style-name="P15"><text:span text:style-name="T12">точные команды установки в Ubuntu, как проверить что всё встало</text:span></text:p>
      <text:p text:style-name="P15"><text:span text:style-name="T12">(например, команда --version).</text:span></text:p>
      <text:p text:style-name="P15"/>
      <text:p text:style-name="P15"><text:span text:style-name="T12">3. ОПИСАНИЕ ОПЕРАЦИЙ: выбери 2-3 главные операции/функции именно</text:span></text:p>
      <text:p text:style-name="P15"><text:span text:style-name="T12">этой программы (одна из них — главная функция из задания билета).</text:span></text:p>
      <text:p text:style-name="P15"><text:span text:style-name="T12">Для каждой дай: условия выполнения; подготовительные действия;</text:span></text:p>
      <text:p text:style-name="P15"><text:span text:style-name="T12">3-5 основных действий по шагам; заключительные действия;</text:span></text:p>
      <text:p text:style-name="P15"><text:span text:style-name="T12">используемые ресурсы.</text:span></text:p>
      <text:p text:style-name="P15"/>
      <text:p text:style-name="P15"><text:span text:style-name="T12">4. АВАРИЙНЫЕ СИТУАЦИИ: для этой программы дай реальные примеры на</text:span></text:p>
      <text:p text:style-name="P15"><text:span text:style-name="T12">каждый из 4 случаев — отказ/зависание; восстановление данных после</text:span></text:p>
      <text:p text:style-name="P15"><text:span text:style-name="T12">сбоя; обнаружение несанкционированного доступа; любая другая</text:span></text:p>
      <text:p text:style-name="P15"><text:span text:style-name="T12">типичная нештатная ситуация именно этой программы.</text:span></text:p>
      <text:p text:style-name="P15"><text:soft-page-break/></text:p>
      <text:p text:style-name="P15"><text:span text:style-name="T12">5. РЕКОМЕНДАЦИИ ПО ОСВОЕНИЮ: с чего начать новичку + опиши простой</text:span></text:p>
      <text:p text:style-name="P15"><text:span text:style-name="T12">контрольный пример (тестовый файл/задачу), правила его запуска и</text:span></text:p>
      <text:p text:style-name="P15"><text:span text:style-name="T12">выполнения, по которым видно что программа работает верно.</text:span></text:p>
      <text:p text:style-name="P15"/>
      <text:p text:style-name="P15"><text:span text:style-name="T12">Ответ дай простым текстом по разделам (без markdown-таблиц,</text:span></text:p>
      <text:p text:style-name="P15"><text:span text:style-name="T12">просто переноси строки) — чтобы легко скопировать в LibreOffice</text:span></text:p>
      <text:p text:style-name="P15"><text:span text:style-name="T12">Writer и вставить вместо плейсхолдеров в готовом шаблоне.</text:span></text:p>
      <text:p text:style-name="Standard"/>
      <text:h text:style-name="P1" text:outline-level="1">СПРАВКА. О стандарте ГОСТ Р 59795-2021</text:h>
      <text:p text:style-name="P7"><text:span text:style-name="T11">Эта страница не требуется самим ГОСТом — это справочная информация для тебя. Можешь оставить её в итоговом документе или удалить перед сдачей.</text:span></text:p>
      <text:p text:style-name="P7"><text:span text:style-name="T1">Полное название: национальный стандарт РФ ГОСТ Р 59795-2021 «Информационные технологии. Комплекс стандартов на автоматизированные системы. Автоматизированные системы. Требования к содержанию документов».</text:span></text:p>
      <text:p text:style-name="P7"><text:span text:style-name="T1">Когда принят: утверждён и введён в действие приказом Росстандарта от 25 октября 2021 г. № 1297-ст; дата введения — 30 апреля 2022 г. Стандарт введён впервые (не является переизданием более старого документа).</text:span></text:p>
      <text:p text:style-name="P7"><text:span text:style-name="T1">Что регулирует: это новый, современный стандарт из серии ГОСТ 34/59795 — комплекса стандартов на автоматизированные системы (АС). В отличие от ГОСТ 19.505-79 (который описывает документацию на отдельную программу), этот стандарт описывает требования к документации на автоматизированную систему в целом — пользователь здесь часто работает не с одной программой, а с целым программно-техническим комплексом.</text:span></text:p>
      <text:p text:style-name="P7"><text:span text:style-name="T1">Какие разделы требует документ «Руководство пользователя» (п. 6.4.1):</text:span></text:p>
      <text:list text:continue-numbering="true" text:style-name="WWNum2">
        <text:list-item>
          <text:p text:style-name="P2">введение;</text:p>
        </text:list-item>
        <text:list-item>
          <text:p text:style-name="P2">назначение и условия применения;</text:p>
        </text:list-item>
        <text:list-item>
          <text:p text:style-name="P2">подготовка к работе;</text:p>
        </text:list-item>
        <text:list-item>
          <text:p text:style-name="P2">описание операций;</text:p>
        </text:list-item>
        <text:list-item>
          <text:p text:style-name="P2">аварийные ситуации;</text:p>
        </text:list-item>
        <text:list-item>
          <text:p text:style-name="P2">рекомендации по освоению.</text:p>
        </text:list-item>
      </text:list>
      <text:p text:style-name="P7"><text:span text:style-name="T1">Что должно быть в каждом разделе (кратко):</text:span></text:p>
      <text:list text:continue-numbering="true" text:style-name="WWNum2">
        <text:list-item>
          <text:p text:style-name="P2">«Введение» — краткое описание возможностей программы, уровень подготовки пользователя, перечень документации для ознакомления.</text:p>
        </text:list-item>
        <text:list-item>
          <text:p text:style-name="P2">«Назначение и условия применения» — назначение программы и условия её применения: техника, операционная среда, входные данные, требования к подготовке специалистов.</text:p>
        </text:list-item>
        <text:list-item>
          <text:p text:style-name="P2">«Подготовка к работе» — состав носителя данных, порядок загрузки программы и данных, порядок проверки работоспособности.</text:p>
        </text:list-item>
        <text:list-item>
          <text:p text:style-name="P2">«Описание операций» — все выполняемые функции и операции; для каждой — условия выполнения, подготовительные и основные действия, заключительные действия, используемые ресурсы.</text:p>
        </text:list-item>
        <text:list-item>
          <text:p text:style-name="P2">«Аварийные ситуации» — действия при отказах техники, восстановлении данных, обнаружении несанкционированного доступа и в прочих нештатных случаях.</text:p>
        </text:list-item>
        <text:list-item>
          <text:p text:style-name="P2">«Рекомендации по освоению» — как осваивать программу, включая контрольный пример и правила его запуска/выполнения.</text:p>
        </text:list-item>
      </text:list>
      <text:p text:style-name="P7"><text:span text:style-name="T1">Статус сегодня: стандарт действующий и относительно новый (2021-2022 год), поэтому именно его всё чаще требуют в современных учебных программах и на производстве — особенно там, где речь об автоматизированных системах, а не об одной изолированной программе. Если билет или преподаватель явно просит «Руководство пользователя» без уточнения ГОСТа — структура из этой Части 2 сегодня более вероятный современный стандарт, чем ГОСТ 19.505-79 (см. Часть 1 этого файла), который относится к более старой серии ЕСПД (документация на программы, а не на системы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3pt" fo:language="en" fo:country="US" style:letter-kerning="false" style:font-name-asian="Times New Roman2" style:font-size-asian="13pt" style:language-asian="zh" style:country-asian="CN" style:font-name-complex="Times New Roman2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3pt" fo:language="en" fo:country="US" style:letter-kerning="false" style:font-name-asian="Times New Roman2" style:font-size-asian="13pt" style:language-asian="zh" style:country-asian="CN" style:font-name-complex="Times New Roman2" style:font-size-complex="13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665in" style:contextual-spacing="false"/>
      <style:text-properties style:font-name="Times New Roman1" fo:font-family="'Times New Roman'" style:font-family-generic="swiss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1252in" style:contextual-spacing="false"/>
      <style:text-properties style:font-name="Times New Roman1" fo:font-family="'Times New Roman'" style:font-family-generic="swiss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—" style:num-suffix="—" text:bullet-char="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Шаблон для квалификационного экзамена ПМ.04</meta:initial-creator>
    <dc:creator>Un-named</dc:creator>
    <meta:editing-cycles>1</meta:editing-cycles>
    <meta:creation-date>2026-06-29T02:43:21.180000000</meta:creation-date>
    <dc:date>2026-06-29T02:43:21.180000000</dc:date>
    <meta:document-statistic meta:table-count="4" meta:image-count="0" meta:object-count="0" meta:page-count="27" meta:paragraph-count="315" meta:word-count="2563" meta:character-count="19755" meta:non-whitespace-character-count="17471"/>
    <meta:generator>LibreOffice/24.2.7.2$Linux_X86_64 LibreOffice_project/420$Build-2</meta:generator>
  </office:meta>
</office:document-meta>
</file>