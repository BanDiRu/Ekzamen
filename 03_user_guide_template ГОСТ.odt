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931in" fo:margin-left="0.0007in" fo:margin-top="0in" fo:margin-bottom="0in" table:align="left" style:writing-mode="page"/>
    </style:style>
    <style:style style:name="Table1.A" style:family="table-column">
      <style:table-column-properties style:column-width="2.6771in"/>
    </style:style>
    <style:style style:name="Table1.B" style:family="table-column">
      <style:table-column-properties style:column-width="4.01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d9e2f3" fo:padding-left="0.0833in" fo:padding-right="0.0833in" fo:padding-top="0.0556in" fo:padding-bottom="0.0556in" fo:border="0.1pt solid #999999">
        <style:background-image/>
      </style:table-cell-properties>
    </style:style>
    <style:style style:name="Table1.A2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1.B2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1.A3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1.B3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1.A4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1.B4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1.A5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1.B5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1.A6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1.B6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1.A7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1.B7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" style:family="table">
      <style:table-properties style:width="6.6931in" fo:margin-left="0.0007in" fo:margin-top="0in" fo:margin-bottom="0in" table:align="left" style:writing-mode="page"/>
    </style:style>
    <style:style style:name="Table2.A" style:family="table-column">
      <style:table-column-properties style:column-width="2.0076in"/>
    </style:style>
    <style:style style:name="Table2.B" style:family="table-column">
      <style:table-column-properties style:column-width="2.6771in"/>
    </style:style>
    <style:style style:name="Table2.C" style:family="table-column">
      <style:table-column-properties style:column-width="2.008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d9e2f3" fo:padding-left="0.0833in" fo:padding-right="0.0833in" fo:padding-top="0.0556in" fo:padding-bottom="0.0556in" fo:border="0.1pt solid #999999">
        <style:background-image/>
      </style:table-cell-properties>
    </style:style>
    <style:style style:name="Table2.A2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B2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C2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A3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B3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C3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A4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B4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C4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A5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B5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C5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A6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B6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C6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" style:family="table">
      <style:table-properties style:width="6.6931in" fo:margin-left="0.0007in" fo:margin-top="0in" fo:margin-bottom="0in" table:align="left" style:writing-mode="page"/>
    </style:style>
    <style:style style:name="Table3.A" style:family="table-column">
      <style:table-column-properties style:column-width="2.2083in"/>
    </style:style>
    <style:style style:name="Table3.B" style:family="table-column">
      <style:table-column-properties style:column-width="2.2757in"/>
    </style:style>
    <style:style style:name="Table3.C" style:family="table-column">
      <style:table-column-properties style:column-width="2.20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d9e2f3" fo:padding-left="0.0833in" fo:padding-right="0.0833in" fo:padding-top="0.0556in" fo:padding-bottom="0.0556in" fo:border="0.1pt solid #999999">
        <style:background-image/>
      </style:table-cell-properties>
    </style:style>
    <style:style style:name="Table3.A2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.B2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.C2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.A3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.B3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.C3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.A4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.B4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.C4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.A5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.B5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.C5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P1" style:family="paragraph" style:parent-style-name="Heading_20_1">
      <style:paragraph-properties fo:margin-top="0in" fo:margin-bottom="0.1665in" style:contextual-spacing="false" fo:break-before="page"/>
    </style:style>
    <style:style style:name="P2" style:family="paragraph" style:parent-style-name="List_20_Paragraph" style:list-style-name="WWNum2"/>
    <style:style style:name="P3" style:family="paragraph" style:parent-style-name="List_20_Paragraph" style:list-style-name="WWNum3"/>
    <style:style style:name="P4" style:family="paragraph" style:parent-style-name="List_20_Paragraph" style:list-style-name="WWNum4"/>
    <style:style style:name="P5" style:family="paragraph" style:parent-style-name="Standard">
      <style:paragraph-properties fo:margin-top="0in" fo:margin-bottom="0.139in" style:contextual-spacing="false" fo:text-align="center" style:justify-single-word="false"/>
    </style:style>
    <style:style style:name="P6" style:family="paragraph" style:parent-style-name="Standard">
      <style:paragraph-properties fo:margin-top="0in" fo:margin-bottom="1.111in" style:contextual-spacing="false" fo:text-align="center" style:justify-single-word="false"/>
    </style:style>
    <style:style style:name="P7" style:family="paragraph" style:parent-style-name="Standard">
      <style:paragraph-properties fo:margin-top="0in" fo:margin-bottom="0.0693in" style:contextual-spacing="false" fo:text-align="center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top="0in" fo:margin-bottom="0.0555in" style:contextual-spacing="false" fo:text-align="end" style:justify-single-word="false"/>
    </style:style>
    <style:style style:name="P10" style:family="paragraph" style:parent-style-name="Standard">
      <style:paragraph-properties fo:margin-top="0in" fo:margin-bottom="1.111in" style:contextual-spacing="false" fo:text-align="end" style:justify-single-word="false"/>
    </style:style>
    <style:style style:name="P11" style:family="paragraph" style:parent-style-name="Standard">
      <style:paragraph-properties fo:margin-top="0in" fo:margin-bottom="0.111in" style:contextual-spacing="false"/>
    </style:style>
    <style:style style:name="P12" style:family="paragraph" style:parent-style-name="Standard">
      <loext:graphic-properties draw:fill="solid" draw:fill-color="#f2f2f2"/>
      <style:paragraph-properties fo:margin-top="0in" fo:margin-bottom="0.028in" style:contextual-spacing="false" fo:background-color="#f2f2f2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font-name="Consolas" fo:font-size="10pt" style:font-name-asian="Consolas1" style:font-size-asian="10pt" style:font-name-complex="Consolas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[НАИМЕНОВАНИЕ ОБРАЗОВАТЕЛЬНОЙ ОРГАНИЗАЦИИ]</text:span></text:p>
      <text:p text:style-name="P6"><text:span text:style-name="T1">[Колледж / отделение]</text:span></text:p>
      <text:p text:style-name="P5"><text:span text:style-name="T2">РУКОВОДСТВО ПОЛЬЗОВАТЕЛЯ</text:span></text:p>
      <text:p text:style-name="P7"><text:span text:style-name="T3">(вид документа «Руководство оператора» по ГОСТ 19.505-79)</text:span></text:p>
      <text:p text:style-name="P6"><text:span text:style-name="T5">[НАЗВАНИЕ ПРОГРАММНОГО ОБЕСПЕЧЕНИЯ], версия [X.X]</text:span></text:p>
      <text:p text:style-name="P9"><text:span text:style-name="T4">Составил: [Фамилия И.О.]</text:span></text:p>
      <text:p text:style-name="P9"><text:span text:style-name="T4">Группа: [номер группы]</text:span></text:p>
      <text:p text:style-name="P10"><text:span text:style-name="T4">Экзаменационный билет № [номер]</text:span></text:p>
      <text:p text:style-name="P8"><text:span text:style-name="T4">[Москва, 2026]</text:span></text:p>
      <text:p text:style-name="Standard"/>
      <text:h text:style-name="P1" text:outline-level="1">АННОТАЦИЯ</text:h>
      <text:p text:style-name="P11"><text:span text:style-name="T6">Настоящий документ — руководство оператора для программы [НАЗВАНИЕ ПО] версии [X.X]. В документе приведены сведения о назначении программы, условиях её выполнения, порядке загрузки, запуска, использования и завершения работы, а также о сообщениях, которые программа выдаёт оператору. Содержание и оформление документа соответствуют ГОСТ 19.505-79 «Единая система программной документации (ЕСПД). Руководство оператора. Требования к содержанию и оформлению».</text:span></text:p>
      <text:p text:style-name="Standard"/>
      <text:h text:style-name="P1" text:outline-level="1">СОДЕРЖАНИЕ</text:h>
      <text:p text:style-name="P11"><text:span text:style-name="T6">Аннотация</text:span></text:p>
      <text:p text:style-name="P11"><text:span text:style-name="T6">1. Назначение программы</text:span></text:p>
      <text:p text:style-name="P11"><text:span text:style-name="T6">2. Условия выполнения программы</text:span></text:p>
      <text:p text:style-name="P11"><text:span text:style-name="T6">3. Выполнение программы</text:span></text:p>
      <text:p text:style-name="P11"><text:span text:style-name="T6"><text:s text:c="3"/>3.1 Загрузка и запуск программы</text:span></text:p>
      <text:p text:style-name="P11"><text:span text:style-name="T6"><text:s text:c="3"/>3.2 Описание операций (команды и ответы программы)</text:span></text:p>
      <text:p text:style-name="P11"><text:span text:style-name="T6"><text:s text:c="3"/>3.3 Завершение работы</text:span></text:p>
      <text:p text:style-name="P11"><text:span text:style-name="T6">4. Сообщения оператору</text:span></text:p>
      <text:p text:style-name="P11"><text:span text:style-name="T6">Приложение А. Скриншоты интерфейса программы</text:span></text:p>
      <text:p text:style-name="P11"><text:span text:style-name="T6">Приложение Б. Промпт для DeepSeek (служебная страница — удалить перед сдачей)</text:span></text:p>
      <text:p text:style-name="P11"><text:span text:style-name="T6">Справка. О стандарте ГОСТ 19.505-79 (необязательная страница)</text:span></text:p>
      <text:p text:style-name="Standard"/>
      <text:h text:style-name="P1" text:outline-level="1">1. НАЗНАЧЕНИЕ ПРОГРАММЫ</text:h>
      <text:p text:style-name="P11"><text:span text:style-name="T6">В разделе приведены сведения о назначении программы и информация, достаточная для понимания функций программы и её эксплуатации (п. 2.1 ГОСТ 19.505-79).</text:span></text:p>
      <text:list text:style-name="WWNum2">
        <text:list-item text:start-value="1">
          <text:p text:style-name="P2">Полное наименование: [точное название ПО]</text:p>
        </text:list-item>
        <text:list-item>
          <text:p text:style-name="P2">Версия: [X.X]</text:p>
        </text:list-item>
        <text:list-item>
          <text:p text:style-name="P2">Разработчик / правообладатель: [компания или сообщество]</text:p>
        </text:list-item>
        <text:list-item>
          <text:p text:style-name="P2">Тип распространения: [свободное ПО / open-source / лицензия X]</text:p>
        </text:list-item>
        <text:list-item>
          <text:p text:style-name="P2">Назначение программы: [1-2 предложения о том, для какой задачи предназначена программа]</text:p>
        </text:list-item>
      </text:list>
      <text:p text:style-name="P11"><text:span text:style-name="T6">Основные функции программы:</text:span></text:p>
      <text:list xml:id="list236010795952" text:continue-numbering="true" text:style-name="WWNum2">
        <text:list-item>
          <text:p text:style-name="P2">[функция 1]</text:p>
        </text:list-item>
        <text:list-item>
          <text:p text:style-name="P2">[функция 2]</text:p>
        </text:list-item>
        <text:list-item>
          <text:p text:style-name="P2">[функция 3]</text:p>
        </text:list-item>
      </text:list>
      <text:h text:style-name="Heading_20_1" text:outline-level="1">2. УСЛОВИЯ ВЫПОЛНЕНИЯ ПРОГРАММЫ</text:h>
      <text:p text:style-name="P11"><text:span text:style-name="T6">В разделе указаны условия, необходимые для выполнения программы: минимальный и (или) максимальный состав аппаратных и программных средств (п. 2.2 ГОСТ 19.505-79)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7">Параметр</text:span></text:p>
          </table:table-cell>
          <table:table-cell table:style-name="Table1.A1" office:value-type="string">
            <text:p text:style-name="Standard"><text:span text:style-name="T7">Значение</text:span></text:p>
          </table:table-cell>
        </table:table-row>
        <table:table-row table:style-name="Table1.1">
          <table:table-cell table:style-name="Table1.A2" office:value-type="string">
            <text:p text:style-name="Standard">Операционная система</text:p>
          </table:table-cell>
          <table:table-cell table:style-name="Table1.B2" office:value-type="string">
            <text:p text:style-name="Standard">[например, Ubuntu 22.04 LTS и новее]</text:p>
          </table:table-cell>
        </table:table-row>
        <table:table-row table:style-name="Table1.1">
          <table:table-cell table:style-name="Table1.A3" office:value-type="string">
            <text:p text:style-name="Standard">Минимальный объём ОЗУ</text:p>
          </table:table-cell>
          <table:table-cell table:style-name="Table1.B3" office:value-type="string">
            <text:p text:style-name="Standard">[например, 2 ГБ]</text:p>
          </table:table-cell>
        </table:table-row>
        <table:table-row table:style-name="Table1.1">
          <table:table-cell table:style-name="Table1.A4" office:value-type="string">
            <text:p text:style-name="Standard">Свободное место на диске</text:p>
          </table:table-cell>
          <table:table-cell table:style-name="Table1.B4" office:value-type="string">
            <text:p text:style-name="Standard">[например, 1 ГБ]</text:p>
          </table:table-cell>
        </table:table-row>
        <table:table-row table:style-name="Table1.1">
          <table:table-cell table:style-name="Table1.A5" office:value-type="string">
            <text:p text:style-name="Standard">Дополнительное ПО / зависимости</text:p>
          </table:table-cell>
          <table:table-cell table:style-name="Table1.B5" office:value-type="string">
            <text:p text:style-name="Standard">[библиотеки, runtime, драйверы]</text:p>
          </table:table-cell>
        </table:table-row>
        <table:table-row table:style-name="Table1.1">
          <table:table-cell table:style-name="Table1.A6" office:value-type="string">
            <text:p text:style-name="Standard">Поддерживаемое оборудование</text:p>
          </table:table-cell>
          <table:table-cell table:style-name="Table1.B6" office:value-type="string">
            <text:p text:style-name="Standard">[если применимо: отладочная плата, программатор и т.п.]</text:p>
          </table:table-cell>
        </table:table-row>
        <table:table-row table:style-name="Table1.1">
          <table:table-cell table:style-name="Table1.A7" office:value-type="string">
            <text:p text:style-name="Standard">Права доступа пользователя</text:p>
          </table:table-cell>
          <table:table-cell table:style-name="Table1.B7" office:value-type="string">
            <text:p text:style-name="Standard">[например, права sudo для установки]</text:p>
          </table:table-cell>
        </table:table-row>
      </table:table>
      <text:p text:style-name="Standard"/>
      <text:h text:style-name="P1" text:outline-level="1">3. ВЫПОЛНЕНИЕ ПРОГРАММЫ</text:h>
      <text:p text:style-name="P11"><text:span text:style-name="T6">В разделе указана последовательность действий оператора, обеспечивающих загрузку, запуск, выполнение и завершение программы; приведено описание функций, формата и возможных вариантов команд, с помощью которых оператор управляет программой, а также ответы программы на эти команды (п. 2.3 ГОСТ 19.505-79).</text:span></text:p>
      <text:h text:style-name="Heading_20_2" text:outline-level="2">3.1 Загрузка и запуск программы</text:h>
      <text:list text:style-name="WWNum3">
        <text:list-item text:start-value="1">
          <text:p text:style-name="P3">[способ запуска 1 — например, через меню приложений: Приложения -&gt; ... -&gt; ...]</text:p>
        </text:list-item>
        <text:list-item>
          <text:p text:style-name="P3">[способ запуска 2 — например, через терминал: команда]</text:p>
        </text:list-item>
        <text:list-item>
          <text:p text:style-name="P3">[способ запуска 3 — например, ярлык на рабочем столе]</text:p>
        </text:list-item>
      </text:list>
      <text:h text:style-name="Heading_20_2" text:outline-level="2">3.2 Описание операций (команды и ответы программы)</text:h>
      <text:p text:style-name="P11"><text:span text:style-name="T6">Основные команды/действия оператора при работе с программой и реакция программы на них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<text:span text:style-name="T7">Операция</text:span></text:p>
          </table:table-cell>
          <table:table-cell table:style-name="Table2.A1" office:value-type="string">
            <text:p text:style-name="Standard"><text:span text:style-name="T7">Действие оператора (команда)</text:span></text:p>
          </table:table-cell>
          <table:table-cell table:style-name="Table2.A1" office:value-type="string">
            <text:p text:style-name="Standard"><text:span text:style-name="T7">Ответ программы (результат)</text:span></text:p>
          </table:table-cell>
        </table:table-row>
        <table:table-row table:style-name="Table2.1">
          <table:table-cell table:style-name="Table2.A2" office:value-type="string">
            <text:p text:style-name="Standard">Создание нового проекта/файла</text:p>
          </table:table-cell>
          <table:table-cell table:style-name="Table2.B2" office:value-type="string">
            <text:p text:style-name="Standard">[Файл -&gt; Создать -&gt; ...]</text:p>
          </table:table-cell>
          <table:table-cell table:style-name="Table2.C2" office:value-type="string">
            <text:p text:style-name="Standard">[открывается новый проект]</text:p>
          </table:table-cell>
        </table:table-row>
        <table:table-row table:style-name="Table2.1">
          <table:table-cell table:style-name="Table2.A3" office:value-type="string">
            <text:p text:style-name="Standard">Открытие существующего файла</text:p>
          </table:table-cell>
          <table:table-cell table:style-name="Table2.B3" office:value-type="string">
            <text:p text:style-name="Standard">[Файл -&gt; Открыть -&gt; выбрать файл]</text:p>
          </table:table-cell>
          <table:table-cell table:style-name="Table2.C3" office:value-type="string">
            <text:p text:style-name="Standard">[файл загружается в рабочую область]</text:p>
          </table:table-cell>
        </table:table-row>
        <table:table-row table:style-name="Table2.1">
          <table:table-cell table:style-name="Table2.A4" office:value-type="string">
            <text:p text:style-name="Standard">[основная операция программы]</text:p>
          </table:table-cell>
          <table:table-cell table:style-name="Table2.B4" office:value-type="string">
            <text:p text:style-name="Standard">[описать главную функцию из задания билета]</text:p>
          </table:table-cell>
          <table:table-cell table:style-name="Table2.C4" office:value-type="string">
            <text:p text:style-name="Standard">[результат выполнения операции]</text:p>
          </table:table-cell>
        </table:table-row>
        <table:table-row table:style-name="Table2.1">
          <table:table-cell table:style-name="Table2.A5" office:value-type="string">
            <text:p text:style-name="Standard">Сохранение результата</text:p>
          </table:table-cell>
          <table:table-cell table:style-name="Table2.B5" office:value-type="string">
            <text:p text:style-name="Standard">Файл -&gt; Сохранить (Ctrl+S)</text:p>
          </table:table-cell>
          <table:table-cell table:style-name="Table2.C5" office:value-type="string">
            <text:p text:style-name="Standard">[файл сохранён]</text:p>
          </table:table-cell>
        </table:table-row>
        <table:table-row table:style-name="Table2.1">
          <table:table-cell table:style-name="Table2.A6" office:value-type="string">
            <text:p text:style-name="Standard">[дополнительная операция]</text:p>
          </table:table-cell>
          <table:table-cell table:style-name="Table2.B6" office:value-type="string">
            <text:p text:style-name="Standard">[действие оператора]</text:p>
          </table:table-cell>
          <table:table-cell table:style-name="Table2.C6" office:value-type="string">
            <text:p text:style-name="Standard">[ответ программы]</text:p>
          </table:table-cell>
        </table:table-row>
      </table:table>
      <text:h text:style-name="Heading_20_2" text:outline-level="2">3.3 Завершение работы</text:h>
      <text:list text:style-name="WWNum4">
        <text:list-item text:start-value="1">
          <text:p text:style-name="P4">[способ завершения 1 — например, Файл -&gt; Выход]</text:p>
        </text:list-item>
        <text:list-item>
          <text:p text:style-name="P4">[способ завершения 2 — например, сочетание клавиш]</text:p>
        </text:list-item>
      </text:list>
      <text:p text:style-name="Standard"/>
      <text:h text:style-name="P1" text:outline-level="1">4. СООБЩЕНИЯ ОПЕРАТОРУ</text:h>
      <text:p text:style-name="P11"><text:span text:style-name="T6">В разделе приведены тексты сообщений, выдаваемых в ходе выполнения программы, описание их содержания и соответствующие действия оператора, в том числе действия в случае сбоя и возможность повторного запуска программы (п. 2.5 ГОСТ 19.505-79)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Standard"><text:span text:style-name="T7">Сообщение / текст</text:span></text:p>
          </table:table-cell>
          <table:table-cell table:style-name="Table3.A1" office:value-type="string">
            <text:p text:style-name="Standard"><text:span text:style-name="T7">Причина возникновения</text:span></text:p>
          </table:table-cell>
          <table:table-cell table:style-name="Table3.A1" office:value-type="string">
            <text:p text:style-name="Standard"><text:span text:style-name="T7">Действие оператора</text:span></text:p>
          </table:table-cell>
        </table:table-row>
        <table:table-row table:style-name="Table3.1">
          <table:table-cell table:style-name="Table3.A2" office:value-type="string">
            <text:p text:style-name="Standard">[сообщение 1]</text:p>
          </table:table-cell>
          <table:table-cell table:style-name="Table3.B2" office:value-type="string">
            <text:p text:style-name="Standard">[причина]</text:p>
          </table:table-cell>
          <table:table-cell table:style-name="Table3.C2" office:value-type="string">
            <text:p text:style-name="Standard">[действие]</text:p>
          </table:table-cell>
        </table:table-row>
        <table:table-row table:style-name="Table3.1">
          <table:table-cell table:style-name="Table3.A3" office:value-type="string">
            <text:p text:style-name="Standard">[сообщение 2]</text:p>
          </table:table-cell>
          <table:table-cell table:style-name="Table3.B3" office:value-type="string">
            <text:p text:style-name="Standard">[причина]</text:p>
          </table:table-cell>
          <table:table-cell table:style-name="Table3.C3" office:value-type="string">
            <text:p text:style-name="Standard">[действие]</text:p>
          </table:table-cell>
        </table:table-row>
        <table:table-row table:style-name="Table3.1">
          <table:table-cell table:style-name="Table3.A4" office:value-type="string">
            <text:p text:style-name="Standard">[сообщение 3]</text:p>
          </table:table-cell>
          <table:table-cell table:style-name="Table3.B4" office:value-type="string">
            <text:p text:style-name="Standard">[причина]</text:p>
          </table:table-cell>
          <table:table-cell table:style-name="Table3.C4" office:value-type="string">
            <text:p text:style-name="Standard">[действие]</text:p>
          </table:table-cell>
        </table:table-row>
        <table:table-row table:style-name="Table3.1">
          <table:table-cell table:style-name="Table3.A5" office:value-type="string">
            <text:p text:style-name="Standard">[сообщение об ошибке / сбое]</text:p>
          </table:table-cell>
          <table:table-cell table:style-name="Table3.B5" office:value-type="string">
            <text:p text:style-name="Standard">[причина сбоя]</text:p>
          </table:table-cell>
          <table:table-cell table:style-name="Table3.C5" office:value-type="string">
            <text:p text:style-name="Standard">[как перезапустить программу]</text:p>
          </table:table-cell>
        </table:table-row>
      </table:table>
      <text:p text:style-name="P11"><text:span text:style-name="T8">Допускается иллюстрировать содержание разделов поясняющими примерами, таблицами, схемами и графиками (п. 2.6 ГОСТ 19.505-79).</text:span></text:p>
      <text:p text:style-name="Standard"/>
      <text:h text:style-name="P1" text:outline-level="1">ПРИЛОЖЕНИЕ А. Скриншоты интерфейса программы</text:h>
      <text:p text:style-name="P11"><text:span text:style-name="T6">В приложение включены материалы, которые нецелесообразно включать непосредственно в разделы руководства (п. 2.7 ГОСТ 19.505-79).</text:span></text:p>
      <text:p text:style-name="P11"><text:span text:style-name="T8">[Вставить 2-3 скриншота: сделать снимок экрана (Print Screen) -&gt; Вставка -&gt; Рисунок]</text:span></text:p>
      <text:p text:style-name="Standard"/>
      <text:h text:style-name="P1" text:outline-level="1">ПРИЛОЖЕНИЕ Б. Промпт для DeepSeek</text:h>
      <text:p text:style-name="P11"><text:span text:style-name="T9">Эта страница — служебная, для подготовки текста разделов 1-4. Перед сдачей готового документа преподавателю эту страницу нужно удалить.</text:span></text:p>
      <text:p text:style-name="P11"><text:span text:style-name="T6">Как использовать: скопируй промпт ниже целиком, вставь вместо плейсхолдеров название программы и текст задания из билета, отправь в DeepSeek. Полученный текст вставь в разделы 1-4 этого документа вместо квадратных плейсхолдеров.</text:span></text:p>
      <text:p text:style-name="P12"><text:span text:style-name="T10">Ты помогаешь составить «Руководство пользователя» по ГОСТ 19.505-79</text:span></text:p>
      <text:p text:style-name="P12"><text:span text:style-name="T10">для квалификационного экзамена по ПМ.04 «Сопровождение и обслуживание</text:span></text:p>
      <text:p text:style-name="P12"><text:span text:style-name="T10">программного обеспечения» (спец. 09.02.07).</text:span></text:p>
      <text:p text:style-name="P12"/>
      <text:p text:style-name="P12"><text:span text:style-name="T10">ПРОГРАММА, для которой нужно написать руководство:</text:span></text:p>
      <text:p text:style-name="P12"><text:span text:style-name="T10">[НАЗВАНИЕ ПРОГРАММЫ И ВЕРСИЯ]</text:span></text:p>
      <text:p text:style-name="P12"/>
      <text:p text:style-name="P12"><text:span text:style-name="T10">ТЕКСТ ЗАДАНИЯ ИЗ БИЛЕТА (вставь как в билете):</text:span></text:p>
      <text:p text:style-name="P12"><text:span text:style-name="T10">"""</text:span></text:p>
      <text:p text:style-name="P12"><text:span text:style-name="T10">[ВСТАВЬ СЮДА ТЕКСТ РАЗДЕЛА "ЗАДАНИЕ"]</text:span></text:p>
      <text:p text:style-name="P12"><text:span text:style-name="T10">"""</text:span></text:p>
      <text:p text:style-name="P12"/>
      <text:p text:style-name="P12"><text:span text:style-name="T10">ГОСТ 19.505-79 требует 4 раздела: 1) назначение программы;</text:span></text:p>
      <text:p text:style-name="P12"><text:span text:style-name="T10">2) условия выполнения программы; 3) выполнение программы</text:span></text:p>
      <text:p text:style-name="P12"><text:span text:style-name="T10">(3.1 загрузка и запуск, 3.2 описание операций — команды и</text:span></text:p>
      <text:p text:style-name="P12"><text:span text:style-name="T10">ответы программы, 3.3 завершение работы); 4) сообщения оператору.</text:span></text:p>
      <text:p text:style-name="P12"/>
      <text:p text:style-name="P12"><text:span text:style-name="T10">Заполни содержимое каждого раздела для указанной программы:</text:span></text:p>
      <text:p text:style-name="P12"><text:soft-page-break/></text:p>
      <text:p text:style-name="P12"><text:span text:style-name="T10">1. НАЗНАЧЕНИЕ ПРОГРАММЫ: полное название, версия, разработчик,</text:span></text:p>
      <text:p text:style-name="P12"><text:span text:style-name="T10">тип лицензии, назначение (1-2 предложения), 3-5 основных функций.</text:span></text:p>
      <text:p text:style-name="P12"/>
      <text:p text:style-name="P12"><text:span text:style-name="T10">2. УСЛОВИЯ ВЫПОЛНЕНИЯ ПРОГРАММЫ: заполни таблицу — ОС, минимальный</text:span></text:p>
      <text:p text:style-name="P12"><text:span text:style-name="T10">ОЗУ, место на диске, доп. ПО/зависимости, поддерживаемое</text:span></text:p>
      <text:p text:style-name="P12"><text:span text:style-name="T10">оборудование, права доступа пользователя.</text:span></text:p>
      <text:p text:style-name="P12"/>
      <text:p text:style-name="P12"><text:span text:style-name="T10">3. ВЫПОЛНЕНИЕ ПРОГРАММЫ:</text:span></text:p>
      <text:p text:style-name="P12"><text:span text:style-name="T10"><text:s text:c="3"/>3.1 — 2-3 реальных способа загрузки и запуска этой программы</text:span></text:p>
      <text:p text:style-name="P12"><text:span text:style-name="T10"><text:s text:c="9"/>в Ubuntu;</text:span></text:p>
      <text:p text:style-name="P12"><text:span text:style-name="T10"><text:s text:c="3"/>3.2 — таблицу из 5 строк "Операция | Действие оператора</text:span></text:p>
      <text:p text:style-name="P12"><text:span text:style-name="T10"><text:s text:c="9"/>(команда) | Ответ программы" для типичных команд именно</text:span></text:p>
      <text:p text:style-name="P12"><text:span text:style-name="T10"><text:s text:c="9"/>этой программы;</text:span></text:p>
      <text:p text:style-name="P12"><text:span text:style-name="T10"><text:s text:c="3"/>3.3 — 2 реальных способа завершения работы программы.</text:span></text:p>
      <text:p text:style-name="P12"/>
      <text:p text:style-name="P12"><text:span text:style-name="T10">4. СООБЩЕНИЯ ОПЕРАТОРУ: 4 реальные типичные сообщения/ошибки этой</text:span></text:p>
      <text:p text:style-name="P12"><text:span text:style-name="T10">программы, их причину возникновения и действие оператора (включая</text:span></text:p>
      <text:p text:style-name="P12"><text:span text:style-name="T10">действия при сбое и перезапуск программы).</text:span></text:p>
      <text:p text:style-name="P12"/>
      <text:p text:style-name="P12"><text:span text:style-name="T10">Ответ дай простым текстом по разделам (без markdown-таблиц,</text:span></text:p>
      <text:p text:style-name="P12"><text:soft-page-break/><text:span text:style-name="T10">просто переноси строки) — чтобы легко скопировать в LibreOffice</text:span></text:p>
      <text:p text:style-name="P12"><text:span text:style-name="T10">Writer и вставить вместо плейсхолдеров в готовом шаблоне.</text:span></text:p>
      <text:p text:style-name="Standard"/>
      <text:h text:style-name="P1" text:outline-level="1">СПРАВКА. О стандарте ГОСТ 19.505-79</text:h>
      <text:p text:style-name="P11"><text:span text:style-name="T9">Эта страница не требуется самим ГОСТом — это справочная информация для тебя. Можешь оставить её в итоговом документе или удалить перед сдачей.</text:span></text:p>
      <text:p text:style-name="P11"><text:span text:style-name="T6">Полное название: межгосударственный стандарт ГОСТ 19.505-79 «Единая система программной документации (ЕСПД). Руководство оператора. Требования к содержанию и оформлению».</text:span></text:p>
      <text:p text:style-name="P11"><text:span text:style-name="T6">Когда принят: постановлением Госстандарта СССР от 12 января 1979 г. № 74, действует с 1 января 1980 г.; в 1981 году вышло Изменение № 1, которое уточнило формулировки нескольких пунктов.</text:span></text:p>
      <text:p text:style-name="P11"><text:span text:style-name="T6">Что регулирует: стандарт входит в комплекс ГОСТ серии 19 — Единую систему программной документации (ЕСПД), которая описывает виды программных документов и требования к ним. Этот конкретный ГОСТ задаёт состав и оформление документа «Руководство оператора» — в современной учебной практике этот же тип документа часто называют «руководством пользователя».</text:span></text:p>
      <text:p text:style-name="P11"><text:span text:style-name="T6">Какие разделы требует:</text:span></text:p>
      <text:list text:continue-list="list236010795952" text:style-name="WWNum2">
        <text:list-item>
          <text:p text:style-name="P2">назначение программы;</text:p>
        </text:list-item>
        <text:list-item>
          <text:p text:style-name="P2">условия выполнения программы;</text:p>
        </text:list-item>
        <text:list-item>
          <text:p text:style-name="P2">выполнение программы;</text:p>
        </text:list-item>
        <text:list-item>
          <text:p text:style-name="P2">сообщения оператору.</text:p>
        </text:list-item>
      </text:list>
      <text:p text:style-name="P11"><text:span text:style-name="T6">Аннотация и содержание (информационная часть документа) — обязательны. Разделы можно объединять или вводить новые, если того требуют особенности конкретной программы. Допускается иллюстрировать материал примерами, таблицами, схемами и графиками, а вспомогательные материалы выносить в приложения.</text:span></text:p>
      <text:p text:style-name="P11"><text:span text:style-name="T6">Что должно быть в каждом разделе (кратко):</text:span></text:p>
      <text:list text:continue-numbering="true" text:style-name="WWNum2">
        <text:list-item>
          <text:p text:style-name="P2">«Назначение программы» — сведения о назначении и функциях программы, достаточные для понимания того, как её эксплуатировать.</text:p>
        </text:list-item>
        <text:list-item>
          <text:p text:style-name="P2">«Условия выполнения программы» — минимальный и (или) максимальный состав необходимых аппаратных и программных средств.</text:p>
        </text:list-item>
        <text:list-item>
          <text:p text:style-name="P2">«Выполнение программы» — последовательность действий оператора по загрузке, запуску, использованию и завершению программы; описание команд и того, как программа на них отвечает.</text:p>
        </text:list-item>
        <text:list-item>
          <text:p text:style-name="P2">«Сообщения оператору» — тексты сообщений программы, их смысл и действия оператора в ответ, включая действия при сбое и повторный запуск.</text:p>
        </text:list-item>
      </text:list>
      <text:p text:style-name="P11"><text:span text:style-name="T6">Статус сегодня: формально стандарт не отменён и остаётся действующим документом серии ЕСПД, поэтому учебные заведения и часть организаций продолжают ссылаться на него при оформлении документации к программам. Для документации автоматизированных систем (а не отдельных программ) сегодня часто применяют другой, более новый стандарт — ГОСТ Р 59795-2021; у него другая структура разделов, путать его с ГОСТ 19.505-79 не нужно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3pt" fo:language="en" fo:country="US" style:letter-kerning="false" style:font-name-asian="Times New Roman2" style:font-size-asian="13pt" style:language-asian="zh" style:country-asian="CN" style:font-name-complex="Times New Roman2" style:font-size-complex="13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3pt" fo:language="en" fo:country="US" style:letter-kerning="false" style:font-name-asian="Times New Roman2" style:font-size-asian="13pt" style:language-asian="zh" style:country-asian="CN" style:font-name-complex="Times New Roman2" style:font-size-complex="13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25in" fo:margin-bottom="0.1665in" style:contextual-spacing="false"/>
      <style:text-properties style:font-name="Times New Roman1" fo:font-family="'Times New Roman'" style:font-family-generic="swiss" style:font-pitch="variable" fo:font-size="16pt" fo:font-weight="bold" style:font-name-asian="Times New Roman2" style:font-family-asian="'Times New Roman'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665in" fo:margin-bottom="0.1252in" style:contextual-spacing="false"/>
      <style:text-properties style:font-name="Times New Roman1" fo:font-family="'Times New Roman'" style:font-family-generic="swiss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—" style:num-suffix="—" text:bullet-char="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Шаблон для квалификационного экзамена ПМ.04</meta:initial-creator>
    <dc:creator>Un-named</dc:creator>
    <meta:editing-cycles>1</meta:editing-cycles>
    <meta:creation-date>2026-06-29T00:02:27.376000000</meta:creation-date>
    <dc:date>2026-06-29T00:02:27.389000000</dc:date>
    <meta:document-statistic meta:table-count="3" meta:image-count="0" meta:object-count="0" meta:page-count="11" meta:paragraph-count="152" meta:word-count="1127" meta:character-count="8661" meta:non-whitespace-character-count="7639"/>
    <meta:generator>LibreOffice/24.2.7.2$Linux_X86_64 LibreOffice_project/420$Build-2</meta:generator>
  </office:meta>
</office:document-meta>
</file>